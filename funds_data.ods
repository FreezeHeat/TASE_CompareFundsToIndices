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11.638cm"/>
    </style:style>
    <style:style style:name="co4" style:family="table-column">
      <style:table-column-properties fo:break-before="auto" style:column-width="5.62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383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6.479cm"/>
    </style:style>
    <style:style style:name="co11" style:family="table-column">
      <style:table-column-properties fo:break-before="auto" style:column-width="2.609cm"/>
    </style:style>
    <style:style style:name="co12" style:family="table-column">
      <style:table-column-properties fo:break-before="auto" style:column-width="4.043cm"/>
    </style:style>
    <style:style style:name="co13" style:family="table-column">
      <style:table-column-properties fo:break-before="auto" style:column-width="2.723cm"/>
    </style:style>
    <style:style style:name="co14" style:family="table-column">
      <style:table-column-properties fo:break-before="auto" style:column-width="4.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819cm"/>
    </style:style>
    <style:style style:name="co17" style:family="table-column">
      <style:table-column-properties fo:break-before="auto" style:column-width="3.067cm"/>
    </style:style>
    <style:style style:name="co18" style:family="table-column">
      <style:table-column-properties fo:break-before="auto" style:column-width="14.938cm"/>
    </style:style>
    <style:style style:name="co19" style:family="table-column">
      <style:table-column-properties fo:break-before="auto" style:column-width="22.079cm"/>
    </style:style>
    <style:style style:name="co20" style:family="table-column">
      <style:table-column-properties fo:break-before="auto" style:column-width="4.2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Heading_20_1">
      <style:table-cell-properties fo:background-color="#b2b2b2" style:diagonal-bl-tr="none" style:diagonal-tl-br="none" fo:border="0.74pt solid #666666"/>
    </style:style>
    <style:style style:name="ce5" style:family="table-cell" style:parent-style-name="Default" style:data-style-name="N37">
      <style:table-cell-properties fo:border-bottom="0.74pt solid #666666" style:diagonal-bl-tr="none" style:diagonal-tl-br="none" style:text-align-source="fix" style:repeat-content="false" fo:background-color="transparent" fo:border-left="0.74pt solid #666666" fo:border-right="0.74pt solid #666666" fo:border-top="none"/>
      <style:paragraph-properties fo:text-align="end" fo:margin-left="0cm"/>
      <style:text-properties style:use-window-font-color="true"/>
    </style:style>
    <style:style style:name="ce7" style:family="table-cell" style:parent-style-name="Default" style:data-style-name="N37">
      <style:table-cell-properties fo:border-bottom="0.74pt solid #666666" fo:background-color="#eeeeee" style:diagonal-bl-tr="none" style:diagonal-tl-br="none" style:text-align-source="fix" style:repeat-content="false" fo:border-left="0.74pt solid #666666" fo:border-right="0.74pt solid #666666" fo:border-top="none"/>
      <style:paragraph-properties fo:text-align="end" fo:margin-left="0cm"/>
      <style:text-properties style:use-window-font-color="true"/>
    </style:style>
    <style:style style:name="ce8" style:family="table-cell" style:parent-style-name="Default" style:data-style-name="N37">
      <style:table-cell-properties fo:background-color="#eeeeee" style:diagonal-bl-tr="none" style:diagonal-tl-br="none" style:text-align-source="fix" style:repeat-content="false" fo:border="0.74pt solid #666666"/>
      <style:paragraph-properties fo:text-align="end" fo:margin-left="0cm"/>
      <style:text-properties style:use-window-font-color="true"/>
    </style:style>
    <style:style style:name="ce9" style:family="table-cell" style:parent-style-name="Heading_20_1">
      <style:table-cell-properties fo:border-bottom="0.74pt solid #666666" fo:background-color="#b2b2b2" style:diagonal-bl-tr="none" style:diagonal-tl-br="none" fo:border-left="none" fo:border-right="0.74pt solid #666666" fo:border-top="0.74pt solid #666666"/>
      <style:paragraph-properties fo:margin-left="0cm"/>
    </style:style>
    <style:style style:name="ce10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</style:style>
    <style:style style:name="ce11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</style:style>
    <style:style style:name="ce12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0.74pt solid #666666"/>
    </style:style>
    <style:style style:name="ce13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border-left="none" fo:border-right="0.74pt solid #666666" fo:border-top="none"/>
      <style:paragraph-properties fo:text-align="end" fo:margin-left="0cm"/>
      <style:text-properties style:use-window-font-color="true"/>
    </style:style>
    <style:style style:name="ce15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none"/>
      <style:paragraph-properties fo:text-align="end" fo:margin-left="0cm"/>
      <style:text-properties style:use-window-font-color="true"/>
    </style:style>
    <style:style style:name="ce17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0.74pt solid #666666"/>
      <style:paragraph-properties fo:text-align="end" fo:margin-left="0cm"/>
      <style:text-properties style:use-window-font-color="true"/>
    </style:style>
    <style:style style:name="ce16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wrap" fo:border-left="none" fo:border-right="0.74pt solid #666666" fo:border-top="none"/>
      <style:paragraph-properties fo:text-align="end" fo:margin-left="0cm"/>
      <style:text-properties style:use-window-font-color="true"/>
    </style:style>
    <style:style style:name="ce27" style:family="table-cell" style:parent-style-name="Default"/>
    <style:style style:name="ce29" style:family="table-cell" style:parent-style-name="Heading_20_1">
      <style:table-cell-properties fo:border-bottom="0.74pt solid #666666" fo:background-color="#b2b2b2" style:diagonal-bl-tr="none" style:diagonal-tl-br="none" fo:border-left="none" fo:border-right="0.74pt solid #666666" fo:border-top="0.74pt solid #666666"/>
      <style:paragraph-properties fo:margin-left="0cm"/>
    </style:style>
    <style:style style:name="ce30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wrap" fo:border-left="none" fo:border-right="0.74pt solid #666666" fo:border-top="non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imbus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wrap" fo:border-left="none" fo:border-right="0.74pt solid #666666" fo:border-top="non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imbus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wrap" fo:border-left="none" fo:border-right="0.74pt solid #666666" fo:border-top="0.74pt solid #666666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imbus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border-left="none" fo:border-right="0.74pt solid #666666" fo:border-top="none"/>
      <style:paragraph-properties fo:text-align="end" fo:margin-left="0cm"/>
      <style:text-properties style:use-window-font-color="true"/>
    </style:style>
    <style:style style:name="ce35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none"/>
      <style:paragraph-properties fo:text-align="end" fo:margin-left="0cm"/>
      <style:text-properties style:use-window-font-color="true"/>
    </style:style>
    <style:style style:name="ce54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0.74pt solid #666666"/>
      <style:paragraph-properties fo:text-align="end" fo:margin-left="0cm"/>
      <style:text-properties style:use-window-font-color="true"/>
    </style:style>
    <style:style style:name="ce64" style:family="table-cell" style:parent-style-name="Heading_20_1" style:data-style-name="N127">
      <style:table-cell-properties fo:border-bottom="0.74pt solid #666666" fo:background-color="#b2b2b2" style:diagonal-bl-tr="none" style:diagonal-tl-br="none" fo:border-left="none" fo:border-right="0.74pt solid #666666" fo:border-top="0.74pt solid #666666"/>
      <style:paragraph-properties fo:margin-left="0cm"/>
    </style:style>
    <style:style style:name="ce38" style:family="table-cell" style:parent-style-name="Default" style:data-style-name="N127">
      <style:table-cell-properties fo:border-bottom="0.74pt solid #666666" style:diagonal-bl-tr="none" style:diagonal-tl-br="none" style:text-align-source="fix" style:repeat-content="false" fo:background-color="transparent" fo:wrap-option="wrap" fo:border-left="none" fo:border-right="0.74pt solid #666666" fo:border-top="none"/>
      <style:paragraph-properties fo:text-align="end" fo:margin-left="0cm"/>
      <style:text-properties style:use-window-font-color="true"/>
    </style:style>
    <style:style style:name="ce39" style:family="table-cell" style:parent-style-name="Default" style:data-style-name="N127">
      <style:table-cell-properties fo:border-bottom="0.74pt solid #666666" fo:background-color="#eeeeee" style:diagonal-bl-tr="none" style:diagonal-tl-br="none" style:text-align-source="fix" style:repeat-content="false" fo:wrap-option="wrap" fo:border-left="none" fo:border-right="0.74pt solid #666666" fo:border-top="none"/>
      <style:paragraph-properties fo:text-align="end" fo:margin-left="0cm"/>
      <style:text-properties style:use-window-font-color="true"/>
    </style:style>
    <style:style style:name="ce40" style:family="table-cell" style:parent-style-name="Default" style:data-style-name="N127">
      <style:table-cell-properties fo:border-bottom="0.74pt solid #666666" fo:background-color="#eeeeee" style:diagonal-bl-tr="none" style:diagonal-tl-br="none" style:text-align-source="fix" style:repeat-content="false" fo:wrap-option="wrap" fo:border-left="none" fo:border-right="0.74pt solid #666666" fo:border-top="0.74pt solid #666666"/>
      <style:paragraph-properties fo:text-align="end" fo:margin-left="0cm"/>
      <style:text-properties style:use-window-font-color="true"/>
    </style:style>
    <style:style style:name="ce20" style:family="table-cell" style:parent-style-name="Default" style:data-style-name="N127"/>
    <style:style style:name="ce73" style:family="table-cell" style:parent-style-name="Heading_20_1" style:data-style-name="N128">
      <style:table-cell-properties fo:border-bottom="0.74pt solid #666666" fo:background-color="#b2b2b2" style:diagonal-bl-tr="none" style:diagonal-tl-br="none" fo:border-left="none" fo:border-right="0.74pt solid #666666" fo:border-top="0.74pt solid #666666"/>
      <style:paragraph-properties fo:margin-left="0cm"/>
    </style:style>
    <style:style style:name="ce51" style:family="table-cell" style:parent-style-name="Default" style:data-style-name="N128">
      <style:table-cell-properties fo:border-bottom="0.74pt solid #666666" style:diagonal-bl-tr="none" style:diagonal-tl-br="none" style:text-align-source="fix" style:repeat-content="false" fo:background-color="transparent" fo:wrap-option="wrap" fo:border-left="none" fo:border-right="0.74pt solid #666666" fo:border-top="none"/>
      <style:paragraph-properties fo:text-align="end" fo:margin-left="0cm"/>
      <style:text-properties style:use-window-font-color="true"/>
    </style:style>
    <style:style style:name="ce52" style:family="table-cell" style:parent-style-name="Default" style:data-style-name="N128">
      <style:table-cell-properties fo:border-bottom="0.74pt solid #666666" fo:background-color="#eeeeee" style:diagonal-bl-tr="none" style:diagonal-tl-br="none" style:text-align-source="fix" style:repeat-content="false" fo:wrap-option="wrap" fo:border-left="none" fo:border-right="0.74pt solid #666666" fo:border-top="none"/>
      <style:paragraph-properties fo:text-align="end" fo:margin-left="0cm"/>
      <style:text-properties style:use-window-font-color="true"/>
    </style:style>
    <style:style style:name="ce53" style:family="table-cell" style:parent-style-name="Default" style:data-style-name="N128">
      <style:table-cell-properties fo:border-bottom="0.74pt solid #666666" fo:background-color="#eeeeee" style:diagonal-bl-tr="none" style:diagonal-tl-br="none" style:text-align-source="fix" style:repeat-content="false" fo:wrap-option="wrap" fo:border-left="none" fo:border-right="0.74pt solid #666666" fo:border-top="0.74pt solid #666666"/>
      <style:paragraph-properties fo:text-align="end" fo:margin-left="0cm"/>
      <style:text-properties style:use-window-font-color="true"/>
    </style:style>
    <style:style style:name="ce23" style:family="table-cell" style:parent-style-name="Default" style:data-style-name="N128"/>
    <style:style style:name="ce55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wrap" fo:border-left="none" fo:border-right="0.74pt solid #666666" fo:border-top="none"/>
      <style:paragraph-properties fo:text-align="end" fo:margin-left="0cm"/>
      <style:text-properties style:use-window-font-color="true"/>
    </style:style>
    <style:style style:name="ce56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wrap" fo:border-left="none" fo:border-right="0.74pt solid #666666" fo:border-top="none"/>
      <style:paragraph-properties fo:text-align="end" fo:margin-left="0cm"/>
      <style:text-properties style:use-window-font-color="true"/>
    </style:style>
    <style:style style:name="ce5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border-left="none" fo:border-right="0.74pt solid #666666" fo:border-top="none"/>
      <style:paragraph-properties fo:text-align="end" fo:margin-left="0cm"/>
      <style:text-properties style:use-window-font-color="true"/>
    </style:style>
    <style:style style:name="ce59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none"/>
      <style:paragraph-properties fo:text-align="end" fo:margin-left="0cm"/>
      <style:text-properties style:use-window-font-color="true"/>
    </style:style>
    <style:style style:name="ce60" style:family="table-cell" style:parent-style-name="Default" style:data-style-name="N11"/>
    <style:style style:name="ce61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style:use-window-font-color="true"/>
    </style:style>
    <style:style style:name="ce62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style:use-window-font-color="true"/>
    </style:style>
    <style:style style:name="ce63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0.74pt solid #666666"/>
      <style:text-properties style:use-window-font-color="true"/>
    </style:style>
    <style:style style:name="ce86" style:family="table-cell" style:parent-style-name="Heading_20_1">
      <style:table-cell-properties fo:background-color="#b2b2b2" style:diagonal-bl-tr="none" style:diagonal-tl-br="none" fo:border="0.74pt solid #666666"/>
      <style:paragraph-properties fo:margin-left="0cm"/>
    </style:style>
    <style:style style:name="ce65" style:family="table-cell" style:parent-style-name="Default" style:data-style-name="N11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fo:border-right="0.74pt solid #666666" fo:border-top="none"/>
      <style:paragraph-properties fo:text-align="end" fo:margin-left="0cm"/>
      <style:text-properties style:use-window-font-color="true"/>
    </style:style>
    <style:style style:name="ce66" style:family="table-cell" style:parent-style-name="Default" style:data-style-name="N11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fo:border-right="0.74pt solid #666666" fo:border-top="none"/>
      <style:paragraph-properties fo:text-align="end" fo:margin-left="0cm"/>
      <style:text-properties style:use-window-font-color="true"/>
    </style:style>
    <style:style style:name="ce67" style:family="table-cell" style:parent-style-name="Default" style:data-style-name="N11">
      <style:table-cell-properties fo:background-color="#eeeeee" style:diagonal-bl-tr="none" style:diagonal-tl-br="none" style:text-align-source="fix" style:repeat-content="false" fo:wrap-option="wrap" fo:border="0.74pt solid #666666"/>
      <style:paragraph-properties fo:text-align="end" fo:margin-left="0cm"/>
      <style:text-properties style:use-window-font-color="true"/>
    </style:style>
    <style:style style:name="ce4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imbus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-asian="Adwaita Sans" style:font-name-complex="Nimbus Sans"/>
    </style:style>
    <style:style style:name="ce44" style:family="table-cell" style:parent-style-name="Default" style:data-style-name="N11">
      <style:table-cell-properties fo:background-color="#dddddd" style:text-align-source="fix" style:repeat-content="false" fo:border="0.74pt solid #000000"/>
      <style:paragraph-properties fo:text-align="end" fo:margin-left="0cm"/>
    </style:style>
    <style:style style:name="ce45" style:family="table-cell" style:parent-style-name="Default" style:data-style-name="N11">
      <style:table-cell-properties fo:background-color="#dddddd" fo:border="0.74pt solid #000000"/>
    </style:style>
    <style:style style:name="ce46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47" style:family="table-cell" style:parent-style-name="Default">
      <style:table-cell-properties fo:background-color="#dddddd" fo:border="0.74pt solid #000000"/>
    </style:style>
    <style:style style:name="ce48" style:family="table-cell" style:parent-style-name="Default" style:data-style-name="N37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font-name-asian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e" style:country-complex="IL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[Indices.$A$2:.$A$100])" table:allow-empty-cell="true" table:base-cell-address="Funds.C1">
          <table:error-message table:message-type="stop" table:display="true"/>
        </table:content-validation>
        <table:content-validation table:name="val2" table:condition="of:cell-content-is-in-list([Indices.$A$2:.$A$100])" table:allow-empty-cell="true" table:display-list="unsorted" table:base-cell-address="Funds.C2">
          <table:error-message table:message-type="stop" table:display="true"/>
        </table:content-validation>
        <table:content-validation table:name="val3" table:base-cell-address="Funds.D2">
          <table:error-message table:message-type="stop" table:display="true"/>
        </table:content-validation>
        <table:content-validation table:name="val4" table:condition="of:cell-content-is-in-list(&quot;40&quot;;&quot;4A&quot;;&quot;4D + דולר&quot;;&quot;4D + יין יפני&quot;;&quot;4D + רופי&quot;;&quot;6A&quot;;&quot;6D + דולר&quot;;&quot;דולר&quot;)" table:allow-empty-cell="true" table:display-list="unsorted" table:base-cell-address="Funds.H1"/>
      </table:content-validations>
      <table:table table:name="Fu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ce20"/>
        <table:table-column table:style-name="co8" table:default-cell-style-name="ce23"/>
        <table:table-column table:style-name="co9" table:default-cell-style-name="ce60"/>
        <table:table-column table:style-name="co10" table:default-cell-style-name="Default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number-columns-repeated="2" table:default-cell-style-name="Default"/>
        <table:table-row table:style-name="ro1">
          <table:table-cell table:style-name="ce2" office:value-type="string" calcext:value-type="string">
            <text:p>תאריך</text:p>
          </table:table-cell>
          <table:table-cell table:style-name="ce9" office:value-type="string" calcext:value-type="string">
            <text:p>מספר נייר</text:p>
          </table:table-cell>
          <table:table-cell table:style-name="ce9" office:value-type="string" calcext:value-type="string">
            <text:p>קישור</text:p>
          </table:table-cell>
          <table:table-cell table:style-name="ce29" table:content-validation-name="val1" office:value-type="string" calcext:value-type="string">
            <text:p>נכס</text:p>
          </table:table-cell>
          <table:table-cell table:style-name="ce29" table:content-validation-name="val3" office:value-type="string" calcext:value-type="string">
            <text:p>סוג</text:p>
          </table:table-cell>
          <table:table-cell table:style-name="ce64" office:value-type="string" calcext:value-type="string">
            <text:p>תשואה לשנה</text:p>
          </table:table-cell>
          <table:table-cell table:style-name="ce64" office:value-type="string" calcext:value-type="string">
            <text:p>הפרש מדד נטו</text:p>
          </table:table-cell>
          <table:table-cell table:style-name="ce73" office:value-type="string" calcext:value-type="string">
            <text:p>סה"כ עמלות שנתיות</text:p>
          </table:table-cell>
          <table:table-cell table:style-name="ce29" table:content-validation-name="val4" office:value-type="string" calcext:value-type="string">
            <text:p>חשיפה</text:p>
          </table:table-cell>
          <table:table-cell table:style-name="ce29" office:value-type="string" calcext:value-type="string">
            <text:p>הערות</text:p>
          </table:table-cell>
          <table:table-cell table:style-name="ce73" office:value-type="string" calcext:value-type="string">
            <text:p>דמי ניהול</text:p>
          </table:table-cell>
          <table:table-cell table:style-name="ce73" office:value-type="string" calcext:value-type="string">
            <text:p>דמי ניהול משתנים</text:p>
          </table:table-cell>
          <table:table-cell table:style-name="ce73" office:value-type="string" calcext:value-type="string">
            <text:p>דמי נאמנות</text:p>
          </table:table-cell>
          <table:table-cell table:style-name="ce86" office:value-type="string" calcext:value-type="string">
            <text:p>תשואת מדד נטו לשנה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3718" calcext:value-type="float">
            <text:p>1143718</text:p>
          </table:table-cell>
          <table:table-cell table:style-name="ce13" office:value-type="string" calcext:value-type="string">
            <text:p><text:a xlink:href="https://market.tase.co.il/he/market_data/etf/1143718/major_data" xlink:type="simple">https://market.tase.co.il/he/market_data/etf/1143718/major_data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2])); &quot;קרן סל&quot;; ISNUMBER(SEARCH(&quot;/mutual-funds/&quot;; [.C2])); &quot;קרן&quot;; ISNUMBER(SEARCH(&quot;/market_data/security/&quot;; [.C2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5553" calcext:value-type="percentage">
            <text:p>55.53%</text:p>
          </table:table-cell>
          <table:table-cell table:style-name="ce38" table:formula="of:=SUM([.F2]-[.N2])" office:value-type="percentage" office:value="-0.031" calcext:value-type="percentage">
            <text:p>-3.10%</text:p>
          </table:table-cell>
          <table:table-cell table:style-name="ce51" table:formula="of:=SUM([.K2]+[.L2]+[.M2])" office:value-type="percentage" office:value="0.0037" calcext:value-type="percentage">
            <text:p>0.37%</text:p>
          </table:table-cell>
          <table:table-cell table:style-name="ce55" table:content-validation-name="val4" office:value-type="float" office:value="40" calcext:value-type="float">
            <text:p>40</text:p>
          </table:table-cell>
          <table:table-cell table:style-name="ce61"/>
          <table:table-cell table:style-name="ce51" office:value-type="percentage" office:value="0.0025" calcext:value-type="percentage">
            <text:p>0.25%</text:p>
          </table:table-cell>
          <table:table-cell table:style-name="ce51" office:value-type="percentage" office:value="0.001" calcext:value-type="percentage">
            <text:p>0.1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2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55324" calcext:value-type="float">
            <text:p>1155324</text:p>
          </table:table-cell>
          <table:table-cell table:style-name="ce15" office:value-type="string" calcext:value-type="string">
            <text:p><text:a xlink:href="https://market.tase.co.il/he/market_data/etf/1155324/major_data" xlink:type="simple">https://market.tase.co.il/he/market_data/etf/1155324/major_data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3])); &quot;קרן סל&quot;; ISNUMBER(SEARCH(&quot;/mutual-funds/&quot;; [.C3])); &quot;קרן&quot;; ISNUMBER(SEARCH(&quot;/market_data/security/&quot;; [.C3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555" calcext:value-type="percentage">
            <text:p>55.50%</text:p>
          </table:table-cell>
          <table:table-cell table:style-name="ce39" table:formula="of:=SUM([.F3]-[.N3])" office:value-type="percentage" office:value="-0.0313" calcext:value-type="percentage">
            <text:p>-3.13%</text:p>
          </table:table-cell>
          <table:table-cell table:style-name="ce52" table:formula="of:=SUM([.K3]+[.L3]+[.M3])" office:value-type="percentage" office:value="0" calcext:value-type="percentage">
            <text:p>0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number-columns-repeated="3" table:style-name="ce52" office:value-type="percentage" office:value="0" calcext:value-type="percentage">
            <text:p>0%</text:p>
          </table:table-cell>
          <table:table-cell table:style-name="ce66" table:formula="of:=INDEX([Indices.$B$2:.$B$100]; MATCH([.D3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96153" calcext:value-type="float">
            <text:p>1196153</text:p>
          </table:table-cell>
          <table:table-cell table:style-name="ce13" office:value-type="string" calcext:value-type="string">
            <text:p><text:a xlink:href="https://market.tase.co.il/he/market_data/etf/1196153/major_data" xlink:type="simple">https://market.tase.co.il/he/market_data/etf/1196153/major_data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4])); &quot;קרן סל&quot;; ISNUMBER(SEARCH(&quot;/mutual-funds/&quot;; [.C4])); &quot;קרן&quot;; ISNUMBER(SEARCH(&quot;/market_data/security/&quot;; [.C4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5535" calcext:value-type="percentage">
            <text:p>55.35%</text:p>
          </table:table-cell>
          <table:table-cell table:style-name="ce38" table:formula="of:=SUM([.F4]-[.N4])" office:value-type="percentage" office:value="-0.0328000000000001" calcext:value-type="percentage">
            <text:p>-3.28%</text:p>
          </table:table-cell>
          <table:table-cell table:style-name="ce51" table:formula="of:=SUM([.K4]+[.L4]+[.M4])" office:value-type="percentage" office:value="0.0032" calcext:value-type="percentage">
            <text:p>0.32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2" calcext:value-type="percentage">
            <text:p>0.2%</text:p>
          </table:table-cell>
          <table:table-cell table:style-name="ce51" office:value-type="percentage" office:value="0.001" calcext:value-type="percentage">
            <text:p>0.1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4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8899" calcext:value-type="float">
            <text:p>1148899</text:p>
          </table:table-cell>
          <table:table-cell table:style-name="ce15" office:value-type="string" calcext:value-type="string">
            <text:p><text:a xlink:href="https://market.tase.co.il/he/market_data/etf/1148899/major_data" xlink:type="simple">https://market.tase.co.il/he/market_data/etf/1148899/major_data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5])); &quot;קרן סל&quot;; ISNUMBER(SEARCH(&quot;/mutual-funds/&quot;; [.C5])); &quot;קרן&quot;; ISNUMBER(SEARCH(&quot;/market_data/security/&quot;; [.C5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5533" calcext:value-type="percentage">
            <text:p>55.33%</text:p>
          </table:table-cell>
          <table:table-cell table:style-name="ce39" table:formula="of:=SUM([.F5]-[.N5])" office:value-type="percentage" office:value="-0.033" calcext:value-type="percentage">
            <text:p>-3.30%</text:p>
          </table:table-cell>
          <table:table-cell table:style-name="ce52" table:formula="of:=SUM([.K5]+[.L5]+[.M5])" office:value-type="percentage" office:value="0.003585" calcext:value-type="percentage">
            <text:p>0.358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25" calcext:value-type="percentage">
            <text:p>0.25%</text:p>
          </table:table-cell>
          <table:table-cell table:style-name="ce52" office:value-type="percentage" office:value="0.001" calcext:value-type="percentage">
            <text:p>0.1%</text:p>
          </table:table-cell>
          <table:table-cell table:style-name="ce52" office:value-type="percentage" office:value="0.000085" calcext:value-type="percentage">
            <text:p>0.0085%</text:p>
          </table:table-cell>
          <table:table-cell table:style-name="ce66" table:formula="of:=INDEX([Indices.$B$2:.$B$100]; MATCH([.D5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55365" calcext:value-type="float">
            <text:p>1155365</text:p>
          </table:table-cell>
          <table:table-cell table:style-name="ce13" office:value-type="string" calcext:value-type="string">
            <text:p><text:a xlink:href="https://market.tase.co.il/he/market_data/etf/1155365/major_data" xlink:type="simple">https://market.tase.co.il/he/market_data/etf/1155365/major_data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6])); &quot;קרן סל&quot;; ISNUMBER(SEARCH(&quot;/mutual-funds/&quot;; [.C6])); &quot;קרן&quot;; ISNUMBER(SEARCH(&quot;/market_data/security/&quot;; [.C6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5527" calcext:value-type="percentage">
            <text:p>55.27%</text:p>
          </table:table-cell>
          <table:table-cell table:style-name="ce38" table:formula="of:=SUM([.F6]-[.N6])" office:value-type="percentage" office:value="-0.0336000000000001" calcext:value-type="percentage">
            <text:p>-3.36%</text:p>
          </table:table-cell>
          <table:table-cell table:style-name="ce51" table:formula="of:=SUM([.K6]+[.L6]+[.M6])" office:value-type="percentage" office:value="0" calcext:value-type="percentage">
            <text:p>0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number-columns-repeated="3" table:style-name="ce51" office:value-type="percentage" office:value="0" calcext:value-type="percentage">
            <text:p>0%</text:p>
          </table:table-cell>
          <table:table-cell table:style-name="ce65" table:formula="of:=INDEX([Indices.$B$2:.$B$100]; MATCH([.D6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50283" calcext:value-type="float">
            <text:p>1150283</text:p>
          </table:table-cell>
          <table:table-cell table:style-name="ce15" office:value-type="string" calcext:value-type="string">
            <text:p><text:a xlink:href="https://market.tase.co.il/he/market_data/etf/1150283/major_data" xlink:type="simple">https://market.tase.co.il/he/market_data/etf/1150283/major_data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7])); &quot;קרן סל&quot;; ISNUMBER(SEARCH(&quot;/mutual-funds/&quot;; [.C7])); &quot;קרן&quot;; ISNUMBER(SEARCH(&quot;/market_data/security/&quot;; [.C7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5507" calcext:value-type="percentage">
            <text:p>55.07%</text:p>
          </table:table-cell>
          <table:table-cell table:style-name="ce39" table:formula="of:=SUM([.F7]-[.N7])" office:value-type="percentage" office:value="-0.0356000000000001" calcext:value-type="percentage">
            <text:p>-3.56%</text:p>
          </table:table-cell>
          <table:table-cell table:style-name="ce52" table:formula="of:=SUM([.K7]+[.L7]+[.M7])" office:value-type="percentage" office:value="0.00345" calcext:value-type="percentage">
            <text:p>0.34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24" calcext:value-type="percentage">
            <text:p>0.24%</text:p>
          </table:table-cell>
          <table:table-cell table:style-name="ce52" office:value-type="percentage" office:value="0.001" calcext:value-type="percentage">
            <text:p>0.1%</text:p>
          </table:table-cell>
          <table:table-cell table:style-name="ce52" office:value-type="percentage" office:value="0.00005" calcext:value-type="percentage">
            <text:p>0.005%</text:p>
          </table:table-cell>
          <table:table-cell table:style-name="ce66" table:formula="of:=INDEX([Indices.$B$2:.$B$100]; MATCH([.D7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59714" calcext:value-type="float">
            <text:p>1159714</text:p>
          </table:table-cell>
          <table:table-cell table:style-name="ce13" office:value-type="string" calcext:value-type="string">
            <text:p><text:a xlink:href="https://market.tase.co.il/he/market_data/etf/1159714/major_data" xlink:type="simple">https://market.tase.co.il/he/market_data/etf/1159714/major_data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8])); &quot;קרן סל&quot;; ISNUMBER(SEARCH(&quot;/mutual-funds/&quot;; [.C8])); &quot;קרן&quot;; ISNUMBER(SEARCH(&quot;/market_data/security/&quot;; [.C8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5504" calcext:value-type="percentage">
            <text:p>55.04%</text:p>
          </table:table-cell>
          <table:table-cell table:style-name="ce38" table:formula="of:=SUM([.F8]-[.N8])" office:value-type="percentage" office:value="-0.0359" calcext:value-type="percentage">
            <text:p>-3.59%</text:p>
          </table:table-cell>
          <table:table-cell table:style-name="ce51" table:formula="of:=SUM([.K8]+[.L8]+[.M8])" office:value-type="percentage" office:value="0.00005" calcext:value-type="percentage">
            <text:p>0.005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number-columns-repeated="2" table:style-name="ce51" office:value-type="percentage" office:value="0" calcext:value-type="percentage">
            <text:p>0%</text:p>
          </table:table-cell>
          <table:table-cell table:style-name="ce51" office:value-type="percentage" office:value="0.00005" calcext:value-type="percentage">
            <text:p>0.005%</text:p>
          </table:table-cell>
          <table:table-cell table:style-name="ce65" table:formula="of:=INDEX([Indices.$B$2:.$B$100]; MATCH([.D8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55373" calcext:value-type="float">
            <text:p>1155373</text:p>
          </table:table-cell>
          <table:table-cell table:style-name="ce15" office:value-type="string" calcext:value-type="string">
            <text:p><text:a xlink:href="https://market.tase.co.il/he/market_data/etf/1155373/major_data" xlink:type="simple">https://market.tase.co.il/he/market_data/etf/1155373/major_data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9])); &quot;קרן סל&quot;; ISNUMBER(SEARCH(&quot;/mutual-funds/&quot;; [.C9])); &quot;קרן&quot;; ISNUMBER(SEARCH(&quot;/market_data/security/&quot;; [.C9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5492" calcext:value-type="percentage">
            <text:p>54.92%</text:p>
          </table:table-cell>
          <table:table-cell table:style-name="ce39" table:formula="of:=SUM([.F9]-[.N9])" office:value-type="percentage" office:value="-0.0371" calcext:value-type="percentage">
            <text:p>-3.71%</text:p>
          </table:table-cell>
          <table:table-cell table:style-name="ce52" table:formula="of:=SUM([.K9]+[.L9]+[.M9])" office:value-type="percentage" office:value="0.000001" calcext:value-type="percentage">
            <text:p>0.0001%</text:p>
          </table:table-cell>
          <table:table-cell table:style-name="ce56" table:content-validation-name="val4" office:value-type="float" office:value="40" calcext:value-type="float">
            <text:p>40</text:p>
          </table:table-cell>
          <table:table-cell table:style-name="ce62"/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001" calcext:value-type="percentage">
            <text:p>0.0001%</text:p>
          </table:table-cell>
          <table:table-cell table:style-name="ce66" table:formula="of:=INDEX([Indices.$B$2:.$B$100]; MATCH([.D9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6356" calcext:value-type="float">
            <text:p>1146356</text:p>
          </table:table-cell>
          <table:table-cell table:style-name="ce13" office:value-type="string" calcext:value-type="string">
            <text:p><text:a xlink:href="https://market.tase.co.il/he/market_data/etf/1146356/major_data" xlink:type="simple">https://market.tase.co.il/he/market_data/etf/1146356/major_data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10])); &quot;קרן סל&quot;; ISNUMBER(SEARCH(&quot;/mutual-funds/&quot;; [.C10])); &quot;קרן&quot;; ISNUMBER(SEARCH(&quot;/market_data/security/&quot;; [.C10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5492" calcext:value-type="percentage">
            <text:p>54.92%</text:p>
          </table:table-cell>
          <table:table-cell table:style-name="ce38" table:formula="of:=SUM([.F10]-[.N10])" office:value-type="percentage" office:value="-0.0371" calcext:value-type="percentage">
            <text:p>-3.71%</text:p>
          </table:table-cell>
          <table:table-cell table:style-name="ce51" table:formula="of:=SUM([.K10]+[.L10]+[.M10])" office:value-type="percentage" office:value="0.0036" calcext:value-type="percentage">
            <text:p>0.36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25" calcext:value-type="percentage">
            <text:p>0.25%</text:p>
          </table:table-cell>
          <table:table-cell table:style-name="ce51" office:value-type="percentage" office:value="0.001" calcext:value-type="percentage">
            <text:p>0.1%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65" table:formula="of:=INDEX([Indices.$B$2:.$B$100]; MATCH([.D10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12628" calcext:value-type="float">
            <text:p>5112628</text:p>
          </table:table-cell>
          <table:table-cell table:style-name="ce15" office:value-type="string" calcext:value-type="string">
            <text:p><text:a xlink:href="https://maya.tase.co.il/he/funds/mutual-funds/5112628" xlink:type="simple">https://maya.tase.co.il/he/funds/mutual-funds/5112628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11])); &quot;קרן סל&quot;; ISNUMBER(SEARCH(&quot;/mutual-funds/&quot;; [.C11])); &quot;קרן&quot;; ISNUMBER(SEARCH(&quot;/market_data/security/&quot;; [.C11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5438" calcext:value-type="percentage">
            <text:p>54.38%</text:p>
          </table:table-cell>
          <table:table-cell table:style-name="ce39" table:formula="of:=SUM([.F11]-[.N11])" office:value-type="percentage" office:value="-0.0425000000000001" calcext:value-type="percentage">
            <text:p>-4.25%</text:p>
          </table:table-cell>
          <table:table-cell table:style-name="ce52" table:formula="of:=SUM([.K11]+[.L11]+[.M11])" office:value-type="percentage" office:value="0.00125" calcext:value-type="percentage">
            <text:p>0.12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1" calcext:value-type="percentage">
            <text:p>0.1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25" calcext:value-type="percentage">
            <text:p>0.025%</text:p>
          </table:table-cell>
          <table:table-cell table:style-name="ce66" table:formula="of:=INDEX([Indices.$B$2:.$B$100]; MATCH([.D11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2510" calcext:value-type="float">
            <text:p>5122510</text:p>
          </table:table-cell>
          <table:table-cell table:style-name="ce13" office:value-type="string" calcext:value-type="string">
            <text:p><text:a xlink:href="https://maya.tase.co.il/he/funds/mutual-funds/5122510" xlink:type="simple">https://maya.tase.co.il/he/funds/mutual-funds/5122510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12])); &quot;קרן סל&quot;; ISNUMBER(SEARCH(&quot;/mutual-funds/&quot;; [.C12])); &quot;קרן&quot;; ISNUMBER(SEARCH(&quot;/market_data/security/&quot;; [.C12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5437" calcext:value-type="percentage">
            <text:p>54.37%</text:p>
          </table:table-cell>
          <table:table-cell table:style-name="ce38" table:formula="of:=SUM([.F12]-[.N12])" office:value-type="percentage" office:value="-0.0426000000000001" calcext:value-type="percentage">
            <text:p>-4.26%</text:p>
          </table:table-cell>
          <table:table-cell table:style-name="ce51" table:formula="of:=SUM([.K12]+[.L12]+[.M12])" office:value-type="percentage" office:value="0.00068" calcext:value-type="percentage">
            <text:p>0.068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51" office:value-type="percentage" office:value="0.00018" calcext:value-type="percentage">
            <text:p>0.018%</text:p>
          </table:table-cell>
          <table:table-cell table:style-name="ce65" table:formula="of:=INDEX([Indices.$B$2:.$B$100]; MATCH([.D12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09889" calcext:value-type="float">
            <text:p>5109889</text:p>
          </table:table-cell>
          <table:table-cell table:style-name="ce15" office:value-type="string" calcext:value-type="string">
            <text:p><text:a xlink:href="https://maya.tase.co.il/he/funds/mutual-funds/5109889" xlink:type="simple">https://maya.tase.co.il/he/funds/mutual-funds/5109889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13])); &quot;קרן סל&quot;; ISNUMBER(SEARCH(&quot;/mutual-funds/&quot;; [.C13])); &quot;קרן&quot;; ISNUMBER(SEARCH(&quot;/market_data/security/&quot;; [.C13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5433" calcext:value-type="percentage">
            <text:p>54.33%</text:p>
          </table:table-cell>
          <table:table-cell table:style-name="ce39" table:formula="of:=SUM([.F13]-[.N13])" office:value-type="percentage" office:value="-0.043" calcext:value-type="percentage">
            <text:p>-4.30%</text:p>
          </table:table-cell>
          <table:table-cell table:style-name="ce52" table:formula="of:=SUM([.K13]+[.L13]+[.M13])" office:value-type="percentage" office:value="0.00205" calcext:value-type="percentage">
            <text:p>0.20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number-columns-repeated="2" table:style-name="ce52" office:value-type="percentage" office:value="0.001" calcext:value-type="percentage">
            <text:p>0.1%</text:p>
          </table:table-cell>
          <table:table-cell table:style-name="ce52" office:value-type="percentage" office:value="0.00005" calcext:value-type="percentage">
            <text:p>0.005%</text:p>
          </table:table-cell>
          <table:table-cell table:style-name="ce66" table:formula="of:=INDEX([Indices.$B$2:.$B$100]; MATCH([.D13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13345" calcext:value-type="float">
            <text:p>5113345</text:p>
          </table:table-cell>
          <table:table-cell table:style-name="ce13" office:value-type="string" calcext:value-type="string">
            <text:p><text:a xlink:href="https://maya.tase.co.il/he/funds/mutual-funds/5113345" xlink:type="simple">https://maya.tase.co.il/he/funds/mutual-funds/5113345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14])); &quot;קרן סל&quot;; ISNUMBER(SEARCH(&quot;/mutual-funds/&quot;; [.C14])); &quot;קרן&quot;; ISNUMBER(SEARCH(&quot;/market_data/security/&quot;; [.C14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5429" calcext:value-type="percentage">
            <text:p>54.29%</text:p>
          </table:table-cell>
          <table:table-cell table:style-name="ce38" table:formula="of:=SUM([.F14]-[.N14])" office:value-type="percentage" office:value="-0.0434" calcext:value-type="percentage">
            <text:p>-4.34%</text:p>
          </table:table-cell>
          <table:table-cell table:style-name="ce51" table:formula="of:=SUM([.K14]+[.L14]+[.M14])" office:value-type="percentage" office:value="0.00225" calcext:value-type="percentage">
            <text:p>0.225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number-columns-repeated="2" table:style-name="ce51" office:value-type="percentage" office:value="0.001" calcext:value-type="percentage">
            <text:p>0.1%</text:p>
          </table:table-cell>
          <table:table-cell table:style-name="ce51" office:value-type="percentage" office:value="0.00025" calcext:value-type="percentage">
            <text:p>0.025%</text:p>
          </table:table-cell>
          <table:table-cell table:style-name="ce65" table:formula="of:=INDEX([Indices.$B$2:.$B$100]; MATCH([.D14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14657" calcext:value-type="float">
            <text:p>5114657</text:p>
          </table:table-cell>
          <table:table-cell table:style-name="ce15" office:value-type="string" calcext:value-type="string">
            <text:p><text:a xlink:href="https://maya.tase.co.il/he/funds/mutual-funds/5114657" xlink:type="simple">https://maya.tase.co.il/he/funds/mutual-funds/5114657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15])); &quot;קרן סל&quot;; ISNUMBER(SEARCH(&quot;/mutual-funds/&quot;; [.C15])); &quot;קרן&quot;; ISNUMBER(SEARCH(&quot;/market_data/security/&quot;; [.C15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5428" calcext:value-type="percentage">
            <text:p>54.28%</text:p>
          </table:table-cell>
          <table:table-cell table:style-name="ce39" table:formula="of:=SUM([.F15]-[.N15])" office:value-type="percentage" office:value="-0.0435000000000001" calcext:value-type="percentage">
            <text:p>-4.35%</text:p>
          </table:table-cell>
          <table:table-cell table:style-name="ce52" table:formula="of:=SUM([.K15]+[.L15]+[.M15])" office:value-type="percentage" office:value="0.0023" calcext:value-type="percentage">
            <text:p>0.23%</text:p>
          </table:table-cell>
          <table:table-cell table:style-name="ce56" table:content-validation-name="val4" office:value-type="float" office:value="40" calcext:value-type="float">
            <text:p>40</text:p>
          </table:table-cell>
          <table:table-cell table:style-name="ce62"/>
          <table:table-cell table:number-columns-repeated="2" table:style-name="ce52" office:value-type="percentage" office:value="0.001" calcext:value-type="percentage">
            <text:p>0.1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15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55340" calcext:value-type="float">
            <text:p>1155340</text:p>
          </table:table-cell>
          <table:table-cell table:style-name="ce13" office:value-type="string" calcext:value-type="string">
            <text:p><text:a xlink:href="https://market.tase.co.il/he/market_data/etf/1155340/major_data" xlink:type="simple">https://market.tase.co.il/he/market_data/etf/1155340/major_data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16])); &quot;קרן סל&quot;; ISNUMBER(SEARCH(&quot;/mutual-funds/&quot;; [.C16])); &quot;קרן&quot;; ISNUMBER(SEARCH(&quot;/market_data/security/&quot;; [.C16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5422" calcext:value-type="percentage">
            <text:p>54.22%</text:p>
          </table:table-cell>
          <table:table-cell table:style-name="ce38" table:formula="of:=SUM([.F16]-[.N16])" office:value-type="percentage" office:value="-0.0441" calcext:value-type="percentage">
            <text:p>-4.41%</text:p>
          </table:table-cell>
          <table:table-cell table:style-name="ce51" table:formula="of:=SUM([.K16]+[.L16]+[.M16])" office:value-type="percentage" office:value="0.00001" calcext:value-type="percentage">
            <text:p>0.001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number-columns-repeated="2" table:style-name="ce51" office:value-type="percentage" office:value="0" calcext:value-type="percentage">
            <text:p>0%</text:p>
          </table:table-cell>
          <table:table-cell table:style-name="ce51" office:value-type="percentage" office:value="0.00001" calcext:value-type="percentage">
            <text:p>0.001%</text:p>
          </table:table-cell>
          <table:table-cell table:style-name="ce65" table:formula="of:=INDEX([Indices.$B$2:.$B$100]; MATCH([.D16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8808" calcext:value-type="float">
            <text:p>1148808</text:p>
          </table:table-cell>
          <table:table-cell table:style-name="ce15" office:value-type="string" calcext:value-type="string">
            <text:p><text:a xlink:href="https://market.tase.co.il/he/market_data/etf/1148808/major_data" xlink:type="simple">https://market.tase.co.il/he/market_data/etf/1148808/major_data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17])); &quot;קרן סל&quot;; ISNUMBER(SEARCH(&quot;/mutual-funds/&quot;; [.C17])); &quot;קרן&quot;; ISNUMBER(SEARCH(&quot;/market_data/security/&quot;; [.C17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5414" calcext:value-type="percentage">
            <text:p>54.14%</text:p>
          </table:table-cell>
          <table:table-cell table:style-name="ce39" table:formula="of:=SUM([.F17]-[.N17])" office:value-type="percentage" office:value="-0.0449000000000001" calcext:value-type="percentage">
            <text:p>-4.49%</text:p>
          </table:table-cell>
          <table:table-cell table:style-name="ce52" table:formula="of:=SUM([.K17]+[.L17]+[.M17])" office:value-type="percentage" office:value="0.00458" calcext:value-type="percentage">
            <text:p>0.458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35" calcext:value-type="percentage">
            <text:p>0.35%</text:p>
          </table:table-cell>
          <table:table-cell table:style-name="ce52" office:value-type="percentage" office:value="0.001" calcext:value-type="percentage">
            <text:p>0.1%</text:p>
          </table:table-cell>
          <table:table-cell table:style-name="ce52" office:value-type="percentage" office:value="0.00008" calcext:value-type="percentage">
            <text:p>0.008%</text:p>
          </table:table-cell>
          <table:table-cell table:style-name="ce66" table:formula="of:=INDEX([Indices.$B$2:.$B$100]; MATCH([.D17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13063" calcext:value-type="float">
            <text:p>5113063</text:p>
          </table:table-cell>
          <table:table-cell table:style-name="ce13" office:value-type="string" calcext:value-type="string">
            <text:p><text:a xlink:href="https://maya.tase.co.il/he/funds/mutual-funds/5113063" xlink:type="simple">https://maya.tase.co.il/he/funds/mutual-funds/5113063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18])); &quot;קרן סל&quot;; ISNUMBER(SEARCH(&quot;/mutual-funds/&quot;; [.C18])); &quot;קרן&quot;; ISNUMBER(SEARCH(&quot;/market_data/security/&quot;; [.C18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5404" calcext:value-type="percentage">
            <text:p>54.04%</text:p>
          </table:table-cell>
          <table:table-cell table:style-name="ce38" table:formula="of:=SUM([.F18]-[.N18])" office:value-type="percentage" office:value="-0.0459000000000001" calcext:value-type="percentage">
            <text:p>-4.59%</text:p>
          </table:table-cell>
          <table:table-cell table:style-name="ce51" table:formula="of:=SUM([.K18]+[.L18]+[.M18])" office:value-type="percentage" office:value="0.0002" calcext:value-type="percentage">
            <text:p>0.02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number-columns-repeated="2"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18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34671" calcext:value-type="float">
            <text:p>5134671</text:p>
          </table:table-cell>
          <table:table-cell table:style-name="ce13" office:value-type="string" calcext:value-type="string">
            <text:p><text:a xlink:href="https://maya.tase.co.il/he/funds/mutual-funds/5134671" xlink:type="simple">https://maya.tase.co.il/he/funds/mutual-funds/5134671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19])); &quot;קרן סל&quot;; ISNUMBER(SEARCH(&quot;/mutual-funds/&quot;; [.C19])); &quot;קרן&quot;; ISNUMBER(SEARCH(&quot;/market_data/security/&quot;; [.C19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3184" calcext:value-type="percentage">
            <text:p>31.84%</text:p>
          </table:table-cell>
          <table:table-cell table:style-name="ce38" table:formula="of:=SUM([.F19]-[.N19])" office:value-type="percentage" office:value="-0.2679" calcext:value-type="percentage">
            <text:p>-26.79%</text:p>
          </table:table-cell>
          <table:table-cell table:style-name="ce51" table:formula="of:=SUM([.K19]+[.L19]+[.M19])" office:value-type="percentage" office:value="0.0027" calcext:value-type="percentage">
            <text:p>0.27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25" calcext:value-type="percentage">
            <text:p>0.2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19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238203" calcext:value-type="float">
            <text:p>1238203</text:p>
          </table:table-cell>
          <table:table-cell table:style-name="ce15" office:value-type="string" calcext:value-type="string">
            <text:p><text:a xlink:href="https://market.tase.co.il/he/market_data/etf/1238203/major_data" xlink:type="simple">https://market.tase.co.il/he/market_data/etf/1238203/major_data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20])); &quot;קרן סל&quot;; ISNUMBER(SEARCH(&quot;/mutual-funds/&quot;; [.C20])); &quot;קרן&quot;; ISNUMBER(SEARCH(&quot;/market_data/security/&quot;; [.C20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table:formula="of:=SUM([.F20]-[.N20])" office:value-type="percentage" office:value="-0.5863" calcext:value-type="percentage">
            <text:p>-58.63%</text:p>
          </table:table-cell>
          <table:table-cell table:style-name="ce52" table:formula="of:=SUM([.K20]+[.L20]+[.M20])" office:value-type="percentage" office:value="0.00005" calcext:value-type="percentage">
            <text:p>0.00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 office:value-type="string" calcext:value-type="string">
            <text:p>אין נתון לשנה</text:p>
          </table:table-cell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05" calcext:value-type="percentage">
            <text:p>0.005%</text:p>
          </table:table-cell>
          <table:table-cell table:style-name="ce66" table:formula="of:=INDEX([Indices.$B$2:.$B$100]; MATCH([.D20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42799" calcext:value-type="float">
            <text:p>5142799</text:p>
          </table:table-cell>
          <table:table-cell table:style-name="ce13" office:value-type="string" calcext:value-type="string">
            <text:p><text:a xlink:href="https://maya.tase.co.il/he/funds/mutual-funds/5142799" xlink:type="simple">https://maya.tase.co.il/he/funds/mutual-funds/5142799</text:a></text:p>
          </table:table-cell>
          <table:table-cell table:style-name="ce30" table:content-validation-name="val2" office:value-type="string" calcext:value-type="string">
            <text:p>ת"א 125</text:p>
          </table:table-cell>
          <table:table-cell table:style-name="ce34" table:content-validation-name="val3" table:formula="of:=COM.MICROSOFT.IFS(ISNUMBER(SEARCH(&quot;/etf/&quot;; [.C21])); &quot;קרן סל&quot;; ISNUMBER(SEARCH(&quot;/mutual-funds/&quot;; [.C21])); &quot;קרן&quot;; ISNUMBER(SEARCH(&quot;/market_data/security/&quot;; [.C21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8" table:formula="of:=SUM([.F21]-[.N21])" office:value-type="percentage" office:value="-0.5863" calcext:value-type="percentage">
            <text:p>-58.63%</text:p>
          </table:table-cell>
          <table:table-cell table:style-name="ce51" table:formula="of:=SUM([.K21]+[.L21]+[.M21])" office:value-type="percentage" office:value="0.0002" calcext:value-type="percentage">
            <text:p>0.02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 office:value-type="string" calcext:value-type="string">
            <text:p>אין נתון לשנה</text:p>
          </table:table-cell>
          <table:table-cell table:number-columns-repeated="2"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21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41205" calcext:value-type="float">
            <text:p>5141205</text:p>
          </table:table-cell>
          <table:table-cell table:style-name="ce15" office:value-type="string" calcext:value-type="string">
            <text:p><text:a xlink:href="https://maya.tase.co.il/he/funds/mutual-funds/5141205" xlink:type="simple">https://maya.tase.co.il/he/funds/mutual-funds/5141205</text:a></text:p>
          </table:table-cell>
          <table:table-cell table:style-name="ce31" table:content-validation-name="val2" office:value-type="string" calcext:value-type="string">
            <text:p>ת"א 125</text:p>
          </table:table-cell>
          <table:table-cell table:style-name="ce35" table:content-validation-name="val3" table:formula="of:=COM.MICROSOFT.IFS(ISNUMBER(SEARCH(&quot;/etf/&quot;; [.C22])); &quot;קרן סל&quot;; ISNUMBER(SEARCH(&quot;/mutual-funds/&quot;; [.C22])); &quot;קרן&quot;; ISNUMBER(SEARCH(&quot;/market_data/security/&quot;; [.C22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table:formula="of:=SUM([.F22]-[.N22])" office:value-type="percentage" office:value="-0.5863" calcext:value-type="percentage">
            <text:p>-58.63%</text:p>
          </table:table-cell>
          <table:table-cell table:style-name="ce52" table:formula="of:=SUM([.K22]+[.L22]+[.M22])" office:value-type="percentage" office:value="0.0003" calcext:value-type="percentage">
            <text:p>0.03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 office:value-type="string" calcext:value-type="string">
            <text:p>אין נתון לשנה</text:p>
          </table:table-cell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22]; [Indices.$A$2:.$A$100]; 0))" office:value-type="percentage" office:value="0.5863" calcext:value-type="percentage">
            <text:p>58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209220" calcext:value-type="float">
            <text:p>1209220</text:p>
          </table:table-cell>
          <table:table-cell table:style-name="ce15" office:value-type="string" calcext:value-type="string">
            <text:p><text:a xlink:href="https://market.tase.co.il/he/market_data/security/1209220/major_data" xlink:type="simple">https://market.tase.co.il/he/market_data/security/1209220/major_data</text:a></text:p>
          </table:table-cell>
          <table:table-cell table:style-name="ce31" table:content-validation-name="val2" office:value-type="string" calcext:value-type="string">
            <text:p>FTSE ALL WORLD</text:p>
          </table:table-cell>
          <table:table-cell table:style-name="ce35" table:content-validation-name="val3" table:formula="of:=COM.MICROSOFT.IFS(ISNUMBER(SEARCH(&quot;/etf/&quot;; [.C23])); &quot;קרן סל&quot;; ISNUMBER(SEARCH(&quot;/mutual-funds/&quot;; [.C23])); &quot;קרן&quot;; ISNUMBER(SEARCH(&quot;/market_data/security/&quot;; [.C23])); &quot;קרן חוץ&quot;; 1; &quot;&quot;)" office:value-type="string" office:string-value="קרן חוץ" calcext:value-type="string">
            <text:p>קרן חוץ</text:p>
          </table:table-cell>
          <table:table-cell table:style-name="ce39" office:value-type="percentage" office:value="0.2614" calcext:value-type="percentage">
            <text:p>26.14%</text:p>
          </table:table-cell>
          <table:table-cell table:style-name="ce39" table:formula="of:=SUM([.F23]-[.N23])" office:value-type="percentage" office:value="0.004" calcext:value-type="percentage">
            <text:p>0.40%</text:p>
          </table:table-cell>
          <table:table-cell table:style-name="ce52" table:formula="of:=SUM([.K23]+[.L23]+[.M23])" office:value-type="percentage" office:value="0.0015" calcext:value-type="percentage">
            <text:p>0.15%</text:p>
          </table:table-cell>
          <table:table-cell table:style-name="ce56" table:content-validation-name="val4" office:value-type="string" calcext:value-type="string">
            <text:p>דולר</text:p>
          </table:table-cell>
          <table:table-cell table:style-name="ce62" office:value-type="string" calcext:value-type="string">
            <text:p>מיסוי נוסף - אירלנד 15%</text:p>
          </table:table-cell>
          <table:table-cell table:style-name="ce52" office:value-type="percentage" office:value="0.0015" calcext:value-type="percentage">
            <text:p>0.15%</text:p>
          </table:table-cell>
          <table:table-cell table:number-columns-repeated="2" table:style-name="ce52" office:value-type="percentage" office:value="0" calcext:value-type="percentage">
            <text:p>0%</text:p>
          </table:table-cell>
          <table:table-cell table:style-name="ce66" table:formula="of:=INDEX([Indices.$B$2:.$B$100]; MATCH([.D23]; [Indices.$A$2:.$A$100]; 0))" office:value-type="percentage" office:value="0.2574" calcext:value-type="percentage">
            <text:p>25.7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59235" calcext:value-type="float">
            <text:p>1159235</text:p>
          </table:table-cell>
          <table:table-cell table:style-name="ce13" office:value-type="string" calcext:value-type="string">
            <text:p><text:a xlink:href="https://market.tase.co.il/he/market_data/security/1159235/major_data" xlink:type="simple">https://market.tase.co.il/he/market_data/security/1159235/major_data</text:a></text:p>
          </table:table-cell>
          <table:table-cell table:style-name="ce30" table:content-validation-name="val2" office:value-type="string" calcext:value-type="string">
            <text:p>MSCI AC WORLD INDEX – NTR</text:p>
          </table:table-cell>
          <table:table-cell table:style-name="ce34" table:content-validation-name="val3" table:formula="of:=COM.MICROSOFT.IFS(ISNUMBER(SEARCH(&quot;/etf/&quot;; [.C24])); &quot;קרן סל&quot;; ISNUMBER(SEARCH(&quot;/mutual-funds/&quot;; [.C24])); &quot;קרן&quot;; ISNUMBER(SEARCH(&quot;/market_data/security/&quot;; [.C24])); &quot;קרן חוץ&quot;; 1; &quot;&quot;)" office:value-type="string" office:string-value="קרן חוץ" calcext:value-type="string">
            <text:p>קרן חוץ</text:p>
          </table:table-cell>
          <table:table-cell table:style-name="ce38" office:value-type="percentage" office:value="0.2611" calcext:value-type="percentage">
            <text:p>26.11%</text:p>
          </table:table-cell>
          <table:table-cell table:style-name="ce38" table:formula="of:=SUM([.F24]-[.N24])" office:value-type="percentage" office:value="0.00829999999999997" calcext:value-type="percentage">
            <text:p>0.83%</text:p>
          </table:table-cell>
          <table:table-cell table:style-name="ce51" table:formula="of:=SUM([.K24]+[.L24]+[.M24])" office:value-type="percentage" office:value="0.002" calcext:value-type="percentage">
            <text:p>0.2%</text:p>
          </table:table-cell>
          <table:table-cell table:style-name="ce55" table:content-validation-name="val4" office:value-type="string" calcext:value-type="string">
            <text:p>דולר</text:p>
          </table:table-cell>
          <table:table-cell table:style-name="ce61" office:value-type="string" calcext:value-type="string">
            <text:p>מיסוי נוסף - אירלנד 15%</text:p>
          </table:table-cell>
          <table:table-cell table:style-name="ce51" office:value-type="percentage" office:value="0.002" calcext:value-type="percentage">
            <text:p>0.2%</text:p>
          </table:table-cell>
          <table:table-cell table:number-columns-repeated="2" table:style-name="ce51" office:value-type="percentage" office:value="0" calcext:value-type="percentage">
            <text:p>0%</text:p>
          </table:table-cell>
          <table:table-cell table:style-name="ce65" table:formula="of:=INDEX([Indices.$B$2:.$B$100]; MATCH([.D24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50200" calcext:value-type="float">
            <text:p>1150200</text:p>
          </table:table-cell>
          <table:table-cell table:style-name="ce15" office:value-type="string" calcext:value-type="string">
            <text:p><text:a xlink:href="https://market.tase.co.il/he/market_data/etf/1150200/major_data" xlink:type="simple">https://market.tase.co.il/he/market_data/etf/1150200/major_data</text:a></text:p>
          </table:table-cell>
          <table:table-cell table:style-name="ce31" table:content-validation-name="val2" office:value-type="string" calcext:value-type="string">
            <text:p>MSCI AC WORLD INDEX – NTR</text:p>
          </table:table-cell>
          <table:table-cell table:style-name="ce35" table:content-validation-name="val3" table:formula="of:=COM.MICROSOFT.IFS(ISNUMBER(SEARCH(&quot;/etf/&quot;; [.C25])); &quot;קרן סל&quot;; ISNUMBER(SEARCH(&quot;/mutual-funds/&quot;; [.C25])); &quot;קרן&quot;; ISNUMBER(SEARCH(&quot;/market_data/security/&quot;; [.C25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224" calcext:value-type="percentage">
            <text:p>22.40%</text:p>
          </table:table-cell>
          <table:table-cell table:style-name="ce39" table:formula="of:=SUM([.F25]-[.N25])" office:value-type="percentage" office:value="-0.0288" calcext:value-type="percentage">
            <text:p>-2.88%</text:p>
          </table:table-cell>
          <table:table-cell table:style-name="ce52" table:formula="of:=SUM([.K25]+[.L25]+[.M25])" office:value-type="percentage" office:value="0.0057" calcext:value-type="percentage">
            <text:p>0.57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25" calcext:value-type="percentage">
            <text:p>0.25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25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7362" calcext:value-type="float">
            <text:p>1147362</text:p>
          </table:table-cell>
          <table:table-cell table:style-name="ce15" office:value-type="string" calcext:value-type="string">
            <text:p><text:a xlink:href="https://market.tase.co.il/he/market_data/etf/1147362/major_data" xlink:type="simple">https://market.tase.co.il/he/market_data/etf/1147362/major_data</text:a></text:p>
          </table:table-cell>
          <table:table-cell table:style-name="ce31" table:content-validation-name="val2" office:value-type="string" calcext:value-type="string">
            <text:p>MSCI AC WORLD INDEX – NTR</text:p>
          </table:table-cell>
          <table:table-cell table:style-name="ce35" table:content-validation-name="val3" table:formula="of:=COM.MICROSOFT.IFS(ISNUMBER(SEARCH(&quot;/etf/&quot;; [.C26])); &quot;קרן סל&quot;; ISNUMBER(SEARCH(&quot;/mutual-funds/&quot;; [.C26])); &quot;קרן&quot;; ISNUMBER(SEARCH(&quot;/market_data/security/&quot;; [.C26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2216" calcext:value-type="percentage">
            <text:p>22.16%</text:p>
          </table:table-cell>
          <table:table-cell table:style-name="ce39" table:formula="of:=SUM([.F26]-[.N26])" office:value-type="percentage" office:value="-0.0312" calcext:value-type="percentage">
            <text:p>-3.12%</text:p>
          </table:table-cell>
          <table:table-cell table:style-name="ce52" table:formula="of:=SUM([.K26]+[.L26]+[.M26])" office:value-type="percentage" office:value="0.0055" calcext:value-type="percentage">
            <text:p>0.5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22" calcext:value-type="percentage">
            <text:p>0.22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26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76031" calcext:value-type="float">
            <text:p>1176031</text:p>
          </table:table-cell>
          <table:table-cell table:style-name="ce13" office:value-type="string" calcext:value-type="string">
            <text:p><text:a xlink:href="https://market.tase.co.il/he/market_data/etf/1176031/major_data" xlink:type="simple">https://market.tase.co.il/he/market_data/etf/1176031/major_data</text:a></text:p>
          </table:table-cell>
          <table:table-cell table:style-name="ce30" table:content-validation-name="val2" office:value-type="string" calcext:value-type="string">
            <text:p>MSCI AC WORLD INDEX – NTR</text:p>
          </table:table-cell>
          <table:table-cell table:style-name="ce34" table:content-validation-name="val3" table:formula="of:=COM.MICROSOFT.IFS(ISNUMBER(SEARCH(&quot;/etf/&quot;; [.C27])); &quot;קרן סל&quot;; ISNUMBER(SEARCH(&quot;/mutual-funds/&quot;; [.C27])); &quot;קרן&quot;; ISNUMBER(SEARCH(&quot;/market_data/security/&quot;; [.C27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2176" calcext:value-type="percentage">
            <text:p>21.76%</text:p>
          </table:table-cell>
          <table:table-cell table:style-name="ce38" table:formula="of:=SUM([.F27]-[.N27])" office:value-type="percentage" office:value="-0.0352" calcext:value-type="percentage">
            <text:p>-3.52%</text:p>
          </table:table-cell>
          <table:table-cell table:style-name="ce51" table:formula="of:=SUM([.K27]+[.L27]+[.M27])" office:value-type="percentage" office:value="0.0053" calcext:value-type="percentage">
            <text:p>0.53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2" calcext:value-type="percentage">
            <text:p>0.2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27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4336" calcext:value-type="float">
            <text:p>1144336</text:p>
          </table:table-cell>
          <table:table-cell table:style-name="ce15" office:value-type="string" calcext:value-type="string">
            <text:p><text:a xlink:href="https://market.tase.co.il/he/market_data/etf/1144336/major_data" xlink:type="simple">https://market.tase.co.il/he/market_data/etf/1144336/major_data</text:a></text:p>
          </table:table-cell>
          <table:table-cell table:style-name="ce31" table:content-validation-name="val2" office:value-type="string" calcext:value-type="string">
            <text:p>MSCI AC WORLD INDEX – NTR</text:p>
          </table:table-cell>
          <table:table-cell table:style-name="ce35" table:content-validation-name="val3" table:formula="of:=COM.MICROSOFT.IFS(ISNUMBER(SEARCH(&quot;/etf/&quot;; [.C28])); &quot;קרן סל&quot;; ISNUMBER(SEARCH(&quot;/mutual-funds/&quot;; [.C28])); &quot;קרן&quot;; ISNUMBER(SEARCH(&quot;/market_data/security/&quot;; [.C28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2134" calcext:value-type="percentage">
            <text:p>21.34%</text:p>
          </table:table-cell>
          <table:table-cell table:style-name="ce39" table:formula="of:=SUM([.F28]-[.N28])" office:value-type="percentage" office:value="-0.0394" calcext:value-type="percentage">
            <text:p>-3.94%</text:p>
          </table:table-cell>
          <table:table-cell table:style-name="ce52" table:formula="of:=SUM([.K28]+[.L28]+[.M28])" office:value-type="percentage" office:value="0.0093" calcext:value-type="percentage">
            <text:p>0.93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6" calcext:value-type="percentage">
            <text:p>0.6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28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35330" calcext:value-type="float">
            <text:p>5135330</text:p>
          </table:table-cell>
          <table:table-cell table:style-name="ce13" office:value-type="string" calcext:value-type="string">
            <text:p><text:a xlink:href="https://maya.tase.co.il/he/funds/mutual-funds/5135330" xlink:type="simple">https://maya.tase.co.il/he/funds/mutual-funds/5135330</text:a></text:p>
          </table:table-cell>
          <table:table-cell table:style-name="ce30" table:content-validation-name="val2" office:value-type="string" calcext:value-type="string">
            <text:p>MSCI AC WORLD INDEX – NTR</text:p>
          </table:table-cell>
          <table:table-cell table:style-name="ce34" table:content-validation-name="val3" table:formula="of:=COM.MICROSOFT.IFS(ISNUMBER(SEARCH(&quot;/etf/&quot;; [.C29])); &quot;קרן סל&quot;; ISNUMBER(SEARCH(&quot;/mutual-funds/&quot;; [.C29])); &quot;קרן&quot;; ISNUMBER(SEARCH(&quot;/market_data/security/&quot;; [.C29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0689" calcext:value-type="percentage">
            <text:p>6.89%</text:p>
          </table:table-cell>
          <table:table-cell table:style-name="ce38" table:formula="of:=SUM([.F29]-[.N29])" office:value-type="percentage" office:value="-0.1839" calcext:value-type="percentage">
            <text:p>-18.39%</text:p>
          </table:table-cell>
          <table:table-cell table:style-name="ce51" table:formula="of:=SUM([.K29]+[.L29]+[.M29])" office:value-type="percentage" office:value="0.0063" calcext:value-type="percentage">
            <text:p>0.63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number-columns-repeated="2"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29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9605" calcext:value-type="float">
            <text:p>5139605</text:p>
          </table:table-cell>
          <table:table-cell table:style-name="ce15" office:value-type="string" calcext:value-type="string">
            <text:p><text:a xlink:href="https://maya.tase.co.il/he/funds/mutual-funds/5139605" xlink:type="simple">https://maya.tase.co.il/he/funds/mutual-funds/5139605</text:a></text:p>
          </table:table-cell>
          <table:table-cell table:style-name="ce31" table:content-validation-name="val2" office:value-type="string" calcext:value-type="string">
            <text:p>MSCI AC WORLD INDEX – NTR</text:p>
          </table:table-cell>
          <table:table-cell table:style-name="ce35" table:content-validation-name="val3" table:formula="of:=COM.MICROSOFT.IFS(ISNUMBER(SEARCH(&quot;/etf/&quot;; [.C30])); &quot;קרן סל&quot;; ISNUMBER(SEARCH(&quot;/mutual-funds/&quot;; [.C30])); &quot;קרן&quot;; ISNUMBER(SEARCH(&quot;/market_data/security/&quot;; [.C30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0452" calcext:value-type="percentage">
            <text:p>4.52%</text:p>
          </table:table-cell>
          <table:table-cell table:style-name="ce39" table:formula="of:=SUM([.F30]-[.N30])" office:value-type="percentage" office:value="-0.2076" calcext:value-type="percentage">
            <text:p>-20.76%</text:p>
          </table:table-cell>
          <table:table-cell table:style-name="ce52" table:formula="of:=SUM([.K30]+[.L30]+[.M30])" office:value-type="percentage" office:value="0.00323" calcext:value-type="percentage">
            <text:p>0.323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number-columns-repeated="2" table:style-name="ce52" office:value-type="percentage" office:value="0.0015" calcext:value-type="percentage">
            <text:p>0.15%</text:p>
          </table:table-cell>
          <table:table-cell table:style-name="ce52" office:value-type="percentage" office:value="0.00023" calcext:value-type="percentage">
            <text:p>0.023%</text:p>
          </table:table-cell>
          <table:table-cell table:style-name="ce66" table:formula="of:=INDEX([Indices.$B$2:.$B$100]; MATCH([.D30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9335" calcext:value-type="float">
            <text:p>1149335</text:p>
          </table:table-cell>
          <table:table-cell table:style-name="ce13" office:value-type="string" calcext:value-type="string">
            <text:p><text:a xlink:href="https://market.tase.co.il/he/market_data/etf/1149335/major_data" xlink:type="simple">https://market.tase.co.il/he/market_data/etf/1149335/major_data</text:a></text:p>
          </table:table-cell>
          <table:table-cell table:style-name="ce30" table:content-validation-name="val2" office:value-type="string" calcext:value-type="string">
            <text:p>MSCI AC WORLD INDEX – NTR</text:p>
          </table:table-cell>
          <table:table-cell table:style-name="ce34" table:content-validation-name="val3" table:formula="of:=COM.MICROSOFT.IFS(ISNUMBER(SEARCH(&quot;/etf/&quot;; [.C31])); &quot;קרן סל&quot;; ISNUMBER(SEARCH(&quot;/mutual-funds/&quot;; [.C31])); &quot;קרן&quot;; ISNUMBER(SEARCH(&quot;/market_data/security/&quot;; [.C31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359" calcext:value-type="percentage">
            <text:p>3.59%</text:p>
          </table:table-cell>
          <table:table-cell table:style-name="ce38" table:formula="of:=SUM([.F31]-[.N31])" office:value-type="percentage" office:value="-0.2169" calcext:value-type="percentage">
            <text:p>-21.69%</text:p>
          </table:table-cell>
          <table:table-cell table:style-name="ce51" table:formula="of:=SUM([.K31]+[.L31]+[.M31])" office:value-type="percentage" office:value="0.0087" calcext:value-type="percentage">
            <text:p>0.87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55" calcext:value-type="percentage">
            <text:p>0.55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31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201003" calcext:value-type="float">
            <text:p>1201003</text:p>
          </table:table-cell>
          <table:table-cell table:style-name="ce13" office:value-type="string" calcext:value-type="string">
            <text:p><text:a xlink:href="https://market.tase.co.il/he/market_data/etf/1201003/major_data" xlink:type="simple">https://market.tase.co.il/he/market_data/etf/1201003/major_data</text:a></text:p>
          </table:table-cell>
          <table:table-cell table:style-name="ce30" table:content-validation-name="val2" office:value-type="string" calcext:value-type="string">
            <text:p>MSCI AC WORLD INDEX – NTR</text:p>
          </table:table-cell>
          <table:table-cell table:style-name="ce34" table:content-validation-name="val3" table:formula="of:=COM.MICROSOFT.IFS(ISNUMBER(SEARCH(&quot;/etf/&quot;; [.C32])); &quot;קרן סל&quot;; ISNUMBER(SEARCH(&quot;/mutual-funds/&quot;; [.C32])); &quot;קרן&quot;; ISNUMBER(SEARCH(&quot;/market_data/security/&quot;; [.C32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259" calcext:value-type="percentage">
            <text:p>2.59%</text:p>
          </table:table-cell>
          <table:table-cell table:style-name="ce38" table:formula="of:=SUM([.F32]-[.N32])" office:value-type="percentage" office:value="-0.2269" calcext:value-type="percentage">
            <text:p>-22.69%</text:p>
          </table:table-cell>
          <table:table-cell table:style-name="ce51" table:formula="of:=SUM([.K32]+[.L32]+[.M32])" office:value-type="percentage" office:value="0.005" calcext:value-type="percentage">
            <text:p>0.5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17" calcext:value-type="percentage">
            <text:p>0.17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32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6679" calcext:value-type="float">
            <text:p>1146679</text:p>
          </table:table-cell>
          <table:table-cell table:style-name="ce15" office:value-type="string" calcext:value-type="string">
            <text:p><text:a xlink:href="https://market.tase.co.il/he/market_data/etf/1146679/major_data" xlink:type="simple">https://market.tase.co.il/he/market_data/etf/1146679/major_data</text:a></text:p>
          </table:table-cell>
          <table:table-cell table:style-name="ce31" table:content-validation-name="val2" office:value-type="string" calcext:value-type="string">
            <text:p>MSCI AC WORLD INDEX – NTR</text:p>
          </table:table-cell>
          <table:table-cell table:style-name="ce35" table:content-validation-name="val3" table:formula="of:=COM.MICROSOFT.IFS(ISNUMBER(SEARCH(&quot;/etf/&quot;; [.C33])); &quot;קרן סל&quot;; ISNUMBER(SEARCH(&quot;/mutual-funds/&quot;; [.C33])); &quot;קרן&quot;; ISNUMBER(SEARCH(&quot;/market_data/security/&quot;; [.C33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0223" calcext:value-type="percentage">
            <text:p>2.23%</text:p>
          </table:table-cell>
          <table:table-cell table:style-name="ce39" table:formula="of:=SUM([.F33]-[.N33])" office:value-type="percentage" office:value="-0.2305" calcext:value-type="percentage">
            <text:p>-23.05%</text:p>
          </table:table-cell>
          <table:table-cell table:style-name="ce52" table:formula="of:=SUM([.K33]+[.L33]+[.M33])" office:value-type="percentage" office:value="0.0128" calcext:value-type="percentage">
            <text:p>1.28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95" calcext:value-type="percentage">
            <text:p>0.95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33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9772" calcext:value-type="float">
            <text:p>1149772</text:p>
          </table:table-cell>
          <table:table-cell table:style-name="ce13" office:value-type="string" calcext:value-type="string">
            <text:p><text:a xlink:href="https://market.tase.co.il/he/market_data/etf/1149772/major_data" xlink:type="simple">https://market.tase.co.il/he/market_data/etf/1149772/major_data</text:a></text:p>
          </table:table-cell>
          <table:table-cell table:style-name="ce30" table:content-validation-name="val2" office:value-type="string" calcext:value-type="string">
            <text:p>MSCI AC WORLD INDEX – NTR</text:p>
          </table:table-cell>
          <table:table-cell table:style-name="ce34" table:content-validation-name="val3" table:formula="of:=COM.MICROSOFT.IFS(ISNUMBER(SEARCH(&quot;/etf/&quot;; [.C34])); &quot;קרן סל&quot;; ISNUMBER(SEARCH(&quot;/mutual-funds/&quot;; [.C34])); &quot;קרן&quot;; ISNUMBER(SEARCH(&quot;/market_data/security/&quot;; [.C34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192" calcext:value-type="percentage">
            <text:p>1.92%</text:p>
          </table:table-cell>
          <table:table-cell table:style-name="ce38" table:formula="of:=SUM([.F34]-[.N34])" office:value-type="percentage" office:value="-0.2336" calcext:value-type="percentage">
            <text:p>-23.36%</text:p>
          </table:table-cell>
          <table:table-cell table:style-name="ce51" table:formula="of:=SUM([.K34]+[.L34]+[.M34])" office:value-type="percentage" office:value="0.0097" calcext:value-type="percentage">
            <text:p>0.97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8" calcext:value-type="percentage">
            <text:p>0.8%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34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4237" calcext:value-type="float">
            <text:p>1144237</text:p>
          </table:table-cell>
          <table:table-cell table:style-name="ce15" office:value-type="string" calcext:value-type="string">
            <text:p><text:a xlink:href="https://market.tase.co.il/he/market_data/etf/1144237/major_data" xlink:type="simple">https://market.tase.co.il/he/market_data/etf/1144237/major_data</text:a></text:p>
          </table:table-cell>
          <table:table-cell table:style-name="ce31" table:content-validation-name="val2" office:value-type="string" calcext:value-type="string">
            <text:p>MSCI AC WORLD INDEX – NTR</text:p>
          </table:table-cell>
          <table:table-cell table:style-name="ce35" table:content-validation-name="val3" table:formula="of:=COM.MICROSOFT.IFS(ISNUMBER(SEARCH(&quot;/etf/&quot;; [.C35])); &quot;קרן סל&quot;; ISNUMBER(SEARCH(&quot;/mutual-funds/&quot;; [.C35])); &quot;קרן&quot;; ISNUMBER(SEARCH(&quot;/market_data/security/&quot;; [.C35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0186" calcext:value-type="percentage">
            <text:p>1.86%</text:p>
          </table:table-cell>
          <table:table-cell table:style-name="ce39" table:formula="of:=SUM([.F35]-[.N35])" office:value-type="percentage" office:value="-0.2342" calcext:value-type="percentage">
            <text:p>-23.42%</text:p>
          </table:table-cell>
          <table:table-cell table:style-name="ce52" table:formula="of:=SUM([.K35]+[.L35]+[.M35])" office:value-type="percentage" office:value="0.0133" calcext:value-type="percentage">
            <text:p>1.33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1" calcext:value-type="percentage">
            <text:p>1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35]; [Indices.$A$2:.$A$100]; 0))" office:value-type="percentage" office:value="0.2528" calcext:value-type="percentage">
            <text:p>25.2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38896" calcext:value-type="float">
            <text:p>5138896</text:p>
          </table:table-cell>
          <table:table-cell table:style-name="ce13" office:value-type="string" calcext:value-type="string">
            <text:p><text:a xlink:href="https://maya.tase.co.il/he/funds/mutual-funds/5138896" xlink:type="simple">https://maya.tase.co.il/he/funds/mutual-funds/5138896</text:a></text:p>
          </table:table-cell>
          <table:table-cell table:style-name="ce30" table:content-validation-name="val2" office:value-type="string" calcext:value-type="string">
            <text:p>MSCI INDIA - NTR</text:p>
          </table:table-cell>
          <table:table-cell table:style-name="ce34" table:content-validation-name="val3" table:formula="of:=COM.MICROSOFT.IFS(ISNUMBER(SEARCH(&quot;/etf/&quot;; [.C36])); &quot;קרן סל&quot;; ISNUMBER(SEARCH(&quot;/mutual-funds/&quot;; [.C36])); &quot;קרן&quot;; ISNUMBER(SEARCH(&quot;/market_data/security/&quot;; [.C36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-0.2856" calcext:value-type="percentage">
            <text:p>-28.56%</text:p>
          </table:table-cell>
          <table:table-cell table:style-name="ce38" table:formula="of:=SUM([.F36]-[.N36])" office:value-type="percentage" office:value="-0.1593" calcext:value-type="percentage">
            <text:p>-15.93%</text:p>
          </table:table-cell>
          <table:table-cell table:style-name="ce51" table:formula="of:=SUM([.K36]+[.L36]+[.M36])" office:value-type="percentage" office:value="0.0058" calcext:value-type="percentage">
            <text:p>0.58%</text:p>
          </table:table-cell>
          <table:table-cell table:style-name="ce58" table:content-validation-name="val4" office:value-type="string" calcext:value-type="string">
            <text:p>4D + רופי</text:p>
          </table:table-cell>
          <table:table-cell table:style-name="ce61"/>
          <table:table-cell table:style-name="ce51" office:value-type="percentage" office:value="0.0055" calcext:value-type="percentage">
            <text:p>0.5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36]; [Indices.$A$2:.$A$100]; 0))" office:value-type="percentage" office:value="-0.1263" calcext:value-type="percentage">
            <text:p>-12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7039" calcext:value-type="float">
            <text:p>5137039</text:p>
          </table:table-cell>
          <table:table-cell table:style-name="ce15" office:value-type="string" calcext:value-type="string">
            <text:p><text:a xlink:href="https://maya.tase.co.il/he/funds/mutual-funds/5137039" xlink:type="simple">https://maya.tase.co.il/he/funds/mutual-funds/5137039</text:a></text:p>
          </table:table-cell>
          <table:table-cell table:style-name="ce31" table:content-validation-name="val2" office:value-type="string" calcext:value-type="string">
            <text:p>MSCI INDIA - NTR</text:p>
          </table:table-cell>
          <table:table-cell table:style-name="ce35" table:content-validation-name="val3" table:formula="of:=COM.MICROSOFT.IFS(ISNUMBER(SEARCH(&quot;/etf/&quot;; [.C37])); &quot;קרן סל&quot;; ISNUMBER(SEARCH(&quot;/mutual-funds/&quot;; [.C37])); &quot;קרן&quot;; ISNUMBER(SEARCH(&quot;/market_data/security/&quot;; [.C37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-0.2873" calcext:value-type="percentage">
            <text:p>-28.73%</text:p>
          </table:table-cell>
          <table:table-cell table:style-name="ce39" table:formula="of:=SUM([.F37]-[.N37])" office:value-type="percentage" office:value="-0.161" calcext:value-type="percentage">
            <text:p>-16.10%</text:p>
          </table:table-cell>
          <table:table-cell table:style-name="ce52" table:formula="of:=SUM([.K37]+[.L37]+[.M37])" office:value-type="percentage" office:value="0.0087" calcext:value-type="percentage">
            <text:p>0.87%</text:p>
          </table:table-cell>
          <table:table-cell table:style-name="ce59" table:content-validation-name="val4" office:value-type="string" calcext:value-type="string">
            <text:p>4D + רופי</text:p>
          </table:table-cell>
          <table:table-cell table:style-name="ce62"/>
          <table:table-cell table:style-name="ce52" office:value-type="percentage" office:value="0.0085" calcext:value-type="percentage">
            <text:p>0.85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37]; [Indices.$A$2:.$A$100]; 0))" office:value-type="percentage" office:value="-0.1263" calcext:value-type="percentage">
            <text:p>-12.63%</text:p>
          </table:table-cell>
          <table:table-cell/>
        </table:table-row>
        <table:table-row table:style-name="ro2">
          <table:table-cell table:style-name="ce8" office:value-type="date" office:date-value="2026-06-13" calcext:value-type="date">
            <text:p>13/06/26</text:p>
          </table:table-cell>
          <table:table-cell table:style-name="ce12" office:value-type="float" office:value="1144112" calcext:value-type="float">
            <text:p>1144112</text:p>
          </table:table-cell>
          <table:table-cell table:style-name="ce17" office:value-type="string" calcext:value-type="string">
            <text:p><text:a xlink:href="https://market.tase.co.il/he/market_data/etf/1144112/major_data" xlink:type="simple">https://market.tase.co.il/he/market_data/etf/1144112/major_data</text:a></text:p>
          </table:table-cell>
          <table:table-cell table:style-name="ce33" table:content-validation-name="val2" office:value-type="string" calcext:value-type="string">
            <text:p>MSCI INDIA - NTR</text:p>
          </table:table-cell>
          <table:table-cell table:style-name="ce54" table:content-validation-name="val3" table:formula="of:=COM.MICROSOFT.IFS(ISNUMBER(SEARCH(&quot;/etf/&quot;; [.C38])); &quot;קרן סל&quot;; ISNUMBER(SEARCH(&quot;/mutual-funds/&quot;; [.C38])); &quot;קרן&quot;; ISNUMBER(SEARCH(&quot;/market_data/security/&quot;; [.C38])); &quot;קרן חוץ&quot;; 1; &quot;&quot;)" office:value-type="string" office:string-value="קרן סל" calcext:value-type="string">
            <text:p>קרן סל</text:p>
          </table:table-cell>
          <table:table-cell table:style-name="ce40" office:value-type="percentage" office:value="-0.2946" calcext:value-type="percentage">
            <text:p>-29.46%</text:p>
          </table:table-cell>
          <table:table-cell table:style-name="ce40" table:formula="of:=SUM([.F38]-[.N38])" office:value-type="percentage" office:value="-0.1683" calcext:value-type="percentage">
            <text:p>-16.83%</text:p>
          </table:table-cell>
          <table:table-cell table:style-name="ce53" table:formula="of:=SUM([.K38]+[.L38]+[.M38])" office:value-type="percentage" office:value="0.0123" calcext:value-type="percentage">
            <text:p>1.23%</text:p>
          </table:table-cell>
          <table:table-cell table:style-name="ce54" table:content-validation-name="val4" office:value-type="string" calcext:value-type="string">
            <text:p>4D + רופי</text:p>
          </table:table-cell>
          <table:table-cell table:style-name="ce63"/>
          <table:table-cell table:style-name="ce53" office:value-type="percentage" office:value="0.012" calcext:value-type="percentage">
            <text:p>1.2%</text:p>
          </table:table-cell>
          <table:table-cell table:style-name="ce53" office:value-type="percentage" office:value="0" calcext:value-type="percentage">
            <text:p>0%</text:p>
          </table:table-cell>
          <table:table-cell table:style-name="ce53" office:value-type="percentage" office:value="0.0003" calcext:value-type="percentage">
            <text:p>0.03%</text:p>
          </table:table-cell>
          <table:table-cell table:style-name="ce67" table:formula="of:=INDEX([Indices.$B$2:.$B$100]; MATCH([.D38]; [Indices.$A$2:.$A$100]; 0))" office:value-type="percentage" office:value="-0.1263" calcext:value-type="percentage">
            <text:p>-12.63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office:value-type="float" office:value="1145747" calcext:value-type="float">
            <text:p>1145747</text:p>
          </table:table-cell>
          <table:table-cell table:style-name="ce15" office:value-type="string" calcext:value-type="string">
            <text:p><text:a xlink:href="https://market.tase.co.il/he/market_data/etf/1145747/major_data" xlink:type="simple">https://market.tase.co.il/he/market_data/etf/1145747/major_data</text:a></text:p>
          </table:table-cell>
          <table:table-cell table:style-name="ce31" table:content-validation-name="val2" office:value-type="string" calcext:value-type="string">
            <text:p>MSCI INDIA - NTR</text:p>
          </table:table-cell>
          <table:table-cell table:style-name="ce35" table:content-validation-name="val3" table:formula="of:=COM.MICROSOFT.IFS(ISNUMBER(SEARCH(&quot;/etf/&quot;; [.C39])); &quot;קרן סל&quot;; ISNUMBER(SEARCH(&quot;/mutual-funds/&quot;; [.C39])); &quot;קרן&quot;; ISNUMBER(SEARCH(&quot;/market_data/security/&quot;; [.C39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-0.3038" calcext:value-type="percentage">
            <text:p>-30.38%</text:p>
          </table:table-cell>
          <table:table-cell table:style-name="ce39" table:formula="of:=SUM([.F39]-[.N39])" office:value-type="percentage" office:value="-0.1775" calcext:value-type="percentage">
            <text:p>-17.75%</text:p>
          </table:table-cell>
          <table:table-cell table:style-name="ce52" table:formula="of:=SUM([.K39]+[.L39]+[.M39])" office:value-type="percentage" office:value="0.0103" calcext:value-type="percentage">
            <text:p>1.03%</text:p>
          </table:table-cell>
          <table:table-cell table:style-name="ce56" table:content-validation-name="val4" office:value-type="string" calcext:value-type="string">
            <text:p>4D + רופי</text:p>
          </table:table-cell>
          <table:table-cell table:style-name="ce62"/>
          <table:table-cell table:style-name="ce52" office:value-type="percentage" office:value="0.01" calcext:value-type="percentage">
            <text:p>1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39]; [Indices.$A$2:.$A$100]; 0))" office:value-type="percentage" office:value="-0.1263" calcext:value-type="percentage">
            <text:p>-12.63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85164" calcext:value-type="float">
            <text:p>1185164</text:p>
          </table:table-cell>
          <table:table-cell table:style-name="ce15" office:value-type="string" calcext:value-type="string">
            <text:p><text:a xlink:href="https://market.tase.co.il/he/market_data/security/1185164/major_data" xlink:type="simple">https://market.tase.co.il/he/market_data/security/1185164/major_data</text:a></text:p>
          </table:table-cell>
          <table:table-cell table:style-name="ce31" table:content-validation-name="val2" office:value-type="string" calcext:value-type="string">
            <text:p>MSCI WORLD INDEX – NTR</text:p>
          </table:table-cell>
          <table:table-cell table:style-name="ce35" table:content-validation-name="val3" table:formula="of:=COM.MICROSOFT.IFS(ISNUMBER(SEARCH(&quot;/etf/&quot;; [.C40])); &quot;קרן סל&quot;; ISNUMBER(SEARCH(&quot;/mutual-funds/&quot;; [.C40])); &quot;קרן&quot;; ISNUMBER(SEARCH(&quot;/market_data/security/&quot;; [.C40])); &quot;קרן חוץ&quot;; 1; &quot;&quot;)" office:value-type="string" office:string-value="קרן חוץ" calcext:value-type="string">
            <text:p>קרן חוץ</text:p>
          </table:table-cell>
          <table:table-cell table:style-name="ce39" office:value-type="percentage" office:value="0.2359" calcext:value-type="percentage">
            <text:p>23.59%</text:p>
          </table:table-cell>
          <table:table-cell table:style-name="ce39" table:formula="of:=SUM([.F40]-[.N40])" office:value-type="percentage" office:value="0.0068" calcext:value-type="percentage">
            <text:p>0.68%</text:p>
          </table:table-cell>
          <table:table-cell table:style-name="ce52" table:formula="of:=SUM([.K40]+[.L40]+[.M40])" office:value-type="percentage" office:value="0.0005" calcext:value-type="percentage">
            <text:p>0.05%</text:p>
          </table:table-cell>
          <table:table-cell table:style-name="ce56" table:content-validation-name="val4" office:value-type="string" calcext:value-type="string">
            <text:p>דולר</text:p>
          </table:table-cell>
          <table:table-cell table:style-name="ce62"/>
          <table:table-cell table:style-name="ce52" office:value-type="percentage" office:value="0.0005" calcext:value-type="percentage">
            <text:p>0.05%</text:p>
          </table:table-cell>
          <table:table-cell table:number-columns-repeated="2" table:style-name="ce52" office:value-type="percentage" office:value="0" calcext:value-type="percentage">
            <text:p>0%</text:p>
          </table:table-cell>
          <table:table-cell table:style-name="ce66" table:formula="of:=INDEX([Indices.$B$2:.$B$100]; MATCH([.D40]; [Indices.$A$2:.$A$100]; 0))" office:value-type="percentage" office:value="0.2291" calcext:value-type="percentage">
            <text:p>22.91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9696" calcext:value-type="float">
            <text:p>5139696</text:p>
          </table:table-cell>
          <table:table-cell table:style-name="ce15" office:value-type="string" calcext:value-type="string">
            <text:p><text:a xlink:href="https://maya.tase.co.il/he/funds/mutual-funds/5139696" xlink:type="simple">https://maya.tase.co.il/he/funds/mutual-funds/5139696</text:a></text:p>
          </table:table-cell>
          <table:table-cell table:style-name="ce31" table:content-validation-name="val2" office:value-type="string" calcext:value-type="string">
            <text:p>MSCI WORLD INDEX – NTR</text:p>
          </table:table-cell>
          <table:table-cell table:style-name="ce35" table:content-validation-name="val3" table:formula="of:=COM.MICROSOFT.IFS(ISNUMBER(SEARCH(&quot;/etf/&quot;; [.C41])); &quot;קרן סל&quot;; ISNUMBER(SEARCH(&quot;/mutual-funds/&quot;; [.C41])); &quot;קרן&quot;; ISNUMBER(SEARCH(&quot;/market_data/security/&quot;; [.C41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2275" calcext:value-type="percentage">
            <text:p>22.75%</text:p>
          </table:table-cell>
          <table:table-cell table:style-name="ce39" table:formula="of:=SUM([.F41]-[.N41])" office:value-type="percentage" office:value="-0.00159999999999999" calcext:value-type="percentage">
            <text:p>-0.16%</text:p>
          </table:table-cell>
          <table:table-cell table:style-name="ce52" table:formula="of:=SUM([.K41]+[.L41]+[.M41])" office:value-type="percentage" office:value="0.0033" calcext:value-type="percentage">
            <text:p>0.33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41]; [Indices.$A$2:.$A$100]; 0))" office:value-type="percentage" office:value="0.2291" calcext:value-type="percentage">
            <text:p>22.91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40165" calcext:value-type="float">
            <text:p>5140165</text:p>
          </table:table-cell>
          <table:table-cell table:style-name="ce13" office:value-type="string" calcext:value-type="string">
            <text:p><text:a xlink:href="https://maya.tase.co.il/he/funds/mutual-funds/5140165" xlink:type="simple">https://maya.tase.co.il/he/funds/mutual-funds/5140165</text:a></text:p>
          </table:table-cell>
          <table:table-cell table:style-name="ce30" table:content-validation-name="val2" office:value-type="string" calcext:value-type="string">
            <text:p>MSCI WORLD INDEX – NTR</text:p>
          </table:table-cell>
          <table:table-cell table:style-name="ce34" table:content-validation-name="val3" table:formula="of:=COM.MICROSOFT.IFS(ISNUMBER(SEARCH(&quot;/etf/&quot;; [.C42])); &quot;קרן סל&quot;; ISNUMBER(SEARCH(&quot;/mutual-funds/&quot;; [.C42])); &quot;קרן&quot;; ISNUMBER(SEARCH(&quot;/market_data/security/&quot;; [.C42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227" calcext:value-type="percentage">
            <text:p>22.70%</text:p>
          </table:table-cell>
          <table:table-cell table:style-name="ce38" table:formula="of:=SUM([.F42]-[.N42])" office:value-type="percentage" office:value="-0.00209999999999999" calcext:value-type="percentage">
            <text:p>-0.21%</text:p>
          </table:table-cell>
          <table:table-cell table:style-name="ce51" table:formula="of:=SUM([.K42]+[.L42]+[.M42])" office:value-type="percentage" office:value="0.0033" calcext:value-type="percentage">
            <text:p>0.33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42]; [Indices.$A$2:.$A$100]; 0))" office:value-type="percentage" office:value="0.2291" calcext:value-type="percentage">
            <text:p>22.91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7073" calcext:value-type="float">
            <text:p>1147073</text:p>
          </table:table-cell>
          <table:table-cell table:style-name="ce15" office:value-type="string" calcext:value-type="string">
            <text:p><text:a xlink:href="https://market.tase.co.il/he/market_data/etf/1147073/major_data" xlink:type="simple">https://market.tase.co.il/he/market_data/etf/1147073/major_data</text:a></text:p>
          </table:table-cell>
          <table:table-cell table:style-name="ce31" table:content-validation-name="val2" office:value-type="string" calcext:value-type="string">
            <text:p>MSCI WORLD INDEX – NTR</text:p>
          </table:table-cell>
          <table:table-cell table:style-name="ce35" table:content-validation-name="val3" table:formula="of:=COM.MICROSOFT.IFS(ISNUMBER(SEARCH(&quot;/etf/&quot;; [.C43])); &quot;קרן סל&quot;; ISNUMBER(SEARCH(&quot;/mutual-funds/&quot;; [.C43])); &quot;קרן&quot;; ISNUMBER(SEARCH(&quot;/market_data/security/&quot;; [.C43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1891" calcext:value-type="percentage">
            <text:p>18.91%</text:p>
          </table:table-cell>
          <table:table-cell table:style-name="ce39" table:formula="of:=SUM([.F43]-[.N43])" office:value-type="percentage" office:value="-0.04" calcext:value-type="percentage">
            <text:p>-4.00%</text:p>
          </table:table-cell>
          <table:table-cell table:style-name="ce52" table:formula="of:=SUM([.K43]+[.L43]+[.M43])" office:value-type="percentage" office:value="0.0133" calcext:value-type="percentage">
            <text:p>1.33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1" calcext:value-type="percentage">
            <text:p>1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43]; [Indices.$A$2:.$A$100]; 0))" office:value-type="percentage" office:value="0.2291" calcext:value-type="percentage">
            <text:p>22.91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3866" calcext:value-type="float">
            <text:p>1143866</text:p>
          </table:table-cell>
          <table:table-cell table:style-name="ce15" office:value-type="string" calcext:value-type="string">
            <text:p><text:a xlink:href="https://market.tase.co.il/he/market_data/etf/1143866/major_data" xlink:type="simple">https://market.tase.co.il/he/market_data/etf/1143866/major_data</text:a></text:p>
          </table:table-cell>
          <table:table-cell table:style-name="ce31" table:content-validation-name="val2" office:value-type="string" calcext:value-type="string">
            <text:p>MSCI WORLD INDEX – NTR</text:p>
          </table:table-cell>
          <table:table-cell table:style-name="ce35" table:content-validation-name="val3" table:formula="of:=COM.MICROSOFT.IFS(ISNUMBER(SEARCH(&quot;/etf/&quot;; [.C44])); &quot;קרן סל&quot;; ISNUMBER(SEARCH(&quot;/mutual-funds/&quot;; [.C44])); &quot;קרן&quot;; ISNUMBER(SEARCH(&quot;/market_data/security/&quot;; [.C44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1817" calcext:value-type="percentage">
            <text:p>18.17%</text:p>
          </table:table-cell>
          <table:table-cell table:style-name="ce39" table:formula="of:=SUM([.F44]-[.N44])" office:value-type="percentage" office:value="-0.0474" calcext:value-type="percentage">
            <text:p>-4.74%</text:p>
          </table:table-cell>
          <table:table-cell table:style-name="ce52" table:formula="of:=SUM([.K44]+[.L44]+[.M44])" office:value-type="percentage" office:value="0.0113" calcext:value-type="percentage">
            <text:p>1.13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8" calcext:value-type="percentage">
            <text:p>0.8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44]; [Indices.$A$2:.$A$100]; 0))" office:value-type="percentage" office:value="0.2291" calcext:value-type="percentage">
            <text:p>22.91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22569" calcext:value-type="float">
            <text:p>5122569</text:p>
          </table:table-cell>
          <table:table-cell table:style-name="ce16" office:value-type="string" calcext:value-type="string">
            <text:p><text:a xlink:href="https://maya.tase.co.il/he/funds/mutual-funds/5122569" xlink:type="simple">https://maya.tase.co.il/he/funds/mutual-funds/5122569</text:a></text:p>
          </table:table-cell>
          <table:table-cell table:style-name="ce31" table:content-validation-name="val2" office:value-type="string" calcext:value-type="string">
            <text:p>MSCI WORLD INDEX – NTR</text:p>
          </table:table-cell>
          <table:table-cell table:style-name="ce35" table:content-validation-name="val3" table:formula="of:=COM.MICROSOFT.IFS(ISNUMBER(SEARCH(&quot;/etf/&quot;; [.C45])); &quot;קרן סל&quot;; ISNUMBER(SEARCH(&quot;/mutual-funds/&quot;; [.C45])); &quot;קרן&quot;; ISNUMBER(SEARCH(&quot;/market_data/security/&quot;; [.C45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0437" calcext:value-type="percentage">
            <text:p>4.37%</text:p>
          </table:table-cell>
          <table:table-cell table:style-name="ce39" table:formula="of:=SUM([.F45]-[.N45])" office:value-type="percentage" office:value="-0.1854" calcext:value-type="percentage">
            <text:p>-18.54%</text:p>
          </table:table-cell>
          <table:table-cell table:style-name="ce52" table:formula="of:=SUM([.K45]+[.L45]+[.M45])" office:value-type="percentage" office:value="0.0057" calcext:value-type="percentage">
            <text:p>0.57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25" calcext:value-type="percentage">
            <text:p>0.25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45]; [Indices.$A$2:.$A$100]; 0))" office:value-type="percentage" office:value="0.2291" calcext:value-type="percentage">
            <text:p>22.91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24573" calcext:value-type="float">
            <text:p>5124573</text:p>
          </table:table-cell>
          <table:table-cell table:style-name="ce15" office:value-type="string" calcext:value-type="string">
            <text:p><text:a xlink:href="https://maya.tase.co.il/he/funds/mutual-funds/5124573" xlink:type="simple">https://maya.tase.co.il/he/funds/mutual-funds/5124573</text:a></text:p>
          </table:table-cell>
          <table:table-cell table:style-name="ce31" table:content-validation-name="val2" office:value-type="string" calcext:value-type="string">
            <text:p>MSCI WORLD INDEX – NTR</text:p>
          </table:table-cell>
          <table:table-cell table:style-name="ce35" table:content-validation-name="val3" table:formula="of:=COM.MICROSOFT.IFS(ISNUMBER(SEARCH(&quot;/etf/&quot;; [.C46])); &quot;קרן סל&quot;; ISNUMBER(SEARCH(&quot;/mutual-funds/&quot;; [.C46])); &quot;קרן&quot;; ISNUMBER(SEARCH(&quot;/market_data/security/&quot;; [.C46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0267" calcext:value-type="percentage">
            <text:p>2.67%</text:p>
          </table:table-cell>
          <table:table-cell table:style-name="ce39" table:formula="of:=SUM([.F46]-[.N46])" office:value-type="percentage" office:value="-0.2024" calcext:value-type="percentage">
            <text:p>-20.24%</text:p>
          </table:table-cell>
          <table:table-cell table:style-name="ce52" table:formula="of:=SUM([.K46]+[.L46]+[.M46])" office:value-type="percentage" office:value="0.0064" calcext:value-type="percentage">
            <text:p>0.64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31" calcext:value-type="percentage">
            <text:p>0.31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46]; [Indices.$A$2:.$A$100]; 0))" office:value-type="percentage" office:value="0.2291" calcext:value-type="percentage">
            <text:p>22.91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5804" calcext:value-type="float">
            <text:p>1145804</text:p>
          </table:table-cell>
          <table:table-cell table:style-name="ce15" office:value-type="string" calcext:value-type="string">
            <text:p><text:a xlink:href="https://market.tase.co.il/he/market_data/etf/1145804/major_data" xlink:type="simple">https://market.tase.co.il/he/market_data/etf/1145804/major_data</text:a></text:p>
          </table:table-cell>
          <table:table-cell table:style-name="ce31" table:content-validation-name="val2" office:value-type="string" calcext:value-type="string">
            <text:p>MSCI WORLD INDEX – NTR</text:p>
          </table:table-cell>
          <table:table-cell table:style-name="ce35" table:content-validation-name="val3" table:formula="of:=COM.MICROSOFT.IFS(ISNUMBER(SEARCH(&quot;/etf/&quot;; [.C47])); &quot;קרן סל&quot;; ISNUMBER(SEARCH(&quot;/mutual-funds/&quot;; [.C47])); &quot;קרן&quot;; ISNUMBER(SEARCH(&quot;/market_data/security/&quot;; [.C47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0052" calcext:value-type="percentage">
            <text:p>0.52%</text:p>
          </table:table-cell>
          <table:table-cell table:style-name="ce39" table:formula="of:=SUM([.F47]-[.N47])" office:value-type="percentage" office:value="-0.2239" calcext:value-type="percentage">
            <text:p>-22.39%</text:p>
          </table:table-cell>
          <table:table-cell table:style-name="ce52" table:formula="of:=SUM([.K47]+[.L47]+[.M47])" office:value-type="percentage" office:value="0.0116" calcext:value-type="percentage">
            <text:p>1.16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83" calcext:value-type="percentage">
            <text:p>0.83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47]; [Indices.$A$2:.$A$100]; 0))" office:value-type="percentage" office:value="0.2291" calcext:value-type="percentage">
            <text:p>22.91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86063" calcext:value-type="float">
            <text:p>1186063</text:p>
          </table:table-cell>
          <table:table-cell table:style-name="ce15" office:value-type="string" calcext:value-type="string">
            <text:p><text:a xlink:href="https://market.tase.co.il/he/market_data/security/1186063/major_data" xlink:type="simple">https://market.tase.co.il/he/market_data/security/1186063/major_data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48])); &quot;קרן סל&quot;; ISNUMBER(SEARCH(&quot;/mutual-funds/&quot;; [.C48])); &quot;קרן&quot;; ISNUMBER(SEARCH(&quot;/market_data/security/&quot;; [.C48])); &quot;קרן חוץ&quot;; 1; &quot;&quot;)" office:value-type="string" office:string-value="קרן חוץ" calcext:value-type="string">
            <text:p>קרן חוץ</text:p>
          </table:table-cell>
          <table:table-cell table:style-name="ce39" office:value-type="percentage" office:value="0.3646" calcext:value-type="percentage">
            <text:p>36.46%</text:p>
          </table:table-cell>
          <table:table-cell table:style-name="ce39" table:formula="of:=SUM([.F48]-[.N48])" office:value-type="percentage" office:value="-0.0118" calcext:value-type="percentage">
            <text:p>-1.18%</text:p>
          </table:table-cell>
          <table:table-cell table:style-name="ce52" table:formula="of:=SUM([.K48]+[.L48]+[.M48])" office:value-type="percentage" office:value="0.002" calcext:value-type="percentage">
            <text:p>0.2%</text:p>
          </table:table-cell>
          <table:table-cell table:style-name="ce56" table:content-validation-name="val4" office:value-type="string" calcext:value-type="string">
            <text:p>דולר</text:p>
          </table:table-cell>
          <table:table-cell table:style-name="ce62"/>
          <table:table-cell table:style-name="ce52" office:value-type="percentage" office:value="0.002" calcext:value-type="percentage">
            <text:p>0.2%</text:p>
          </table:table-cell>
          <table:table-cell table:number-columns-repeated="2" table:style-name="ce52" office:value-type="percentage" office:value="0" calcext:value-type="percentage">
            <text:p>0%</text:p>
          </table:table-cell>
          <table:table-cell table:style-name="ce66" table:formula="of:=INDEX([Indices.$B$2:.$B$100]; MATCH([.D48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59243" calcext:value-type="float">
            <text:p>1159243</text:p>
          </table:table-cell>
          <table:table-cell table:style-name="ce13" office:value-type="string" calcext:value-type="string">
            <text:p><text:a xlink:href="https://market.tase.co.il/he/market_data/security/1159243/major_data" xlink:type="simple">https://market.tase.co.il/he/market_data/security/1159243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49])); &quot;קרן סל&quot;; ISNUMBER(SEARCH(&quot;/mutual-funds/&quot;; [.C49])); &quot;קרן&quot;; ISNUMBER(SEARCH(&quot;/market_data/security/&quot;; [.C49])); &quot;קרן חוץ&quot;; 1; &quot;&quot;)" office:value-type="string" office:string-value="קרן חוץ" calcext:value-type="string">
            <text:p>קרן חוץ</text:p>
          </table:table-cell>
          <table:table-cell table:style-name="ce38" office:value-type="percentage" office:value="0.3613" calcext:value-type="percentage">
            <text:p>36.13%</text:p>
          </table:table-cell>
          <table:table-cell table:style-name="ce38" table:formula="of:=SUM([.F49]-[.N49])" office:value-type="percentage" office:value="-0.0151" calcext:value-type="percentage">
            <text:p>-1.51%</text:p>
          </table:table-cell>
          <table:table-cell table:style-name="ce51" table:formula="of:=SUM([.K49]+[.L49]+[.M49])" office:value-type="percentage" office:value="0.003" calcext:value-type="percentage">
            <text:p>0.3%</text:p>
          </table:table-cell>
          <table:table-cell table:style-name="ce55" table:content-validation-name="val4" office:value-type="string" calcext:value-type="string">
            <text:p>דולר</text:p>
          </table:table-cell>
          <table:table-cell table:style-name="ce61" office:value-type="string" calcext:value-type="string">
            <text:p>מיסוי נוסף - אירלנד 15%</text:p>
          </table:table-cell>
          <table:table-cell table:style-name="ce51" office:value-type="percentage" office:value="0.003" calcext:value-type="percentage">
            <text:p>0.3%</text:p>
          </table:table-cell>
          <table:table-cell table:number-columns-repeated="2" table:style-name="ce51" office:value-type="percentage" office:value="0" calcext:value-type="percentage">
            <text:p>0%</text:p>
          </table:table-cell>
          <table:table-cell table:style-name="ce65" table:formula="of:=INDEX([Indices.$B$2:.$B$100]; MATCH([.D49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33574" calcext:value-type="float">
            <text:p>5133574</text:p>
          </table:table-cell>
          <table:table-cell table:style-name="ce13" office:value-type="string" calcext:value-type="string">
            <text:p><text:a xlink:href="https://maya.tase.co.il/he/funds/mutual-funds/5133574" xlink:type="simple">https://maya.tase.co.il/he/funds/mutual-funds/5133574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50])); &quot;קרן סל&quot;; ISNUMBER(SEARCH(&quot;/mutual-funds/&quot;; [.C50])); &quot;קרן&quot;; ISNUMBER(SEARCH(&quot;/market_data/security/&quot;; [.C50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3229" calcext:value-type="percentage">
            <text:p>32.29%</text:p>
          </table:table-cell>
          <table:table-cell table:style-name="ce38" table:formula="of:=SUM([.F50]-[.N50])" office:value-type="percentage" office:value="-0.0535" calcext:value-type="percentage">
            <text:p>-5.35%</text:p>
          </table:table-cell>
          <table:table-cell table:style-name="ce51" table:formula="of:=SUM([.K50]+[.L50]+[.M50])" office:value-type="percentage" office:value="0.0011" calcext:value-type="percentage">
            <text:p>0.11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1" calcext:value-type="percentage">
            <text:p>0.1%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65" table:formula="of:=INDEX([Indices.$B$2:.$B$100]; MATCH([.D50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4549" calcext:value-type="float">
            <text:p>5134549</text:p>
          </table:table-cell>
          <table:table-cell table:style-name="ce15" office:value-type="string" calcext:value-type="string">
            <text:p><text:a xlink:href="https://maya.tase.co.il/he/funds/mutual-funds/5134549" xlink:type="simple">https://maya.tase.co.il/he/funds/mutual-funds/5134549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51])); &quot;קרן סל&quot;; ISNUMBER(SEARCH(&quot;/mutual-funds/&quot;; [.C51])); &quot;קרן&quot;; ISNUMBER(SEARCH(&quot;/market_data/security/&quot;; [.C51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3228" calcext:value-type="percentage">
            <text:p>32.28%</text:p>
          </table:table-cell>
          <table:table-cell table:style-name="ce39" table:formula="of:=SUM([.F51]-[.N51])" office:value-type="percentage" office:value="-0.0536" calcext:value-type="percentage">
            <text:p>-5.36%</text:p>
          </table:table-cell>
          <table:table-cell table:style-name="ce52" table:formula="of:=SUM([.K51]+[.L51]+[.M51])" office:value-type="percentage" office:value="0.0001" calcext:value-type="percentage">
            <text:p>0.01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1" calcext:value-type="percentage">
            <text:p>0.01%</text:p>
          </table:table-cell>
          <table:table-cell table:style-name="ce66" table:formula="of:=INDEX([Indices.$B$2:.$B$100]; MATCH([.D51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3179" calcext:value-type="float">
            <text:p>5123179</text:p>
          </table:table-cell>
          <table:table-cell table:style-name="ce13" office:value-type="string" calcext:value-type="string">
            <text:p><text:a xlink:href="https://maya.tase.co.il/he/funds/mutual-funds/5123179" xlink:type="simple">https://maya.tase.co.il/he/funds/mutual-funds/5123179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52])); &quot;קרן סל&quot;; ISNUMBER(SEARCH(&quot;/mutual-funds/&quot;; [.C52])); &quot;קרן&quot;; ISNUMBER(SEARCH(&quot;/market_data/security/&quot;; [.C52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3198" calcext:value-type="percentage">
            <text:p>31.98%</text:p>
          </table:table-cell>
          <table:table-cell table:style-name="ce38" table:formula="of:=SUM([.F52]-[.N52])" office:value-type="percentage" office:value="-0.0566" calcext:value-type="percentage">
            <text:p>-5.66%</text:p>
          </table:table-cell>
          <table:table-cell table:style-name="ce51" table:formula="of:=SUM([.K52]+[.L52]+[.M52])" office:value-type="percentage" office:value="0.0033" calcext:value-type="percentage">
            <text:p>0.33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52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24516" calcext:value-type="float">
            <text:p>5124516</text:p>
          </table:table-cell>
          <table:table-cell table:style-name="ce15" office:value-type="string" calcext:value-type="string">
            <text:p><text:a xlink:href="https://maya.tase.co.il/he/funds/mutual-funds/5124516" xlink:type="simple">https://maya.tase.co.il/he/funds/mutual-funds/5124516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53])); &quot;קרן סל&quot;; ISNUMBER(SEARCH(&quot;/mutual-funds/&quot;; [.C53])); &quot;קרן&quot;; ISNUMBER(SEARCH(&quot;/market_data/security/&quot;; [.C53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3196" calcext:value-type="percentage">
            <text:p>31.96%</text:p>
          </table:table-cell>
          <table:table-cell table:style-name="ce39" table:formula="of:=SUM([.F53]-[.N53])" office:value-type="percentage" office:value="-0.0568" calcext:value-type="percentage">
            <text:p>-5.68%</text:p>
          </table:table-cell>
          <table:table-cell table:style-name="ce52" table:formula="of:=SUM([.K53]+[.L53]+[.M53])" office:value-type="percentage" office:value="0.00325" calcext:value-type="percentage">
            <text:p>0.32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5" calcext:value-type="percentage">
            <text:p>0.025%</text:p>
          </table:table-cell>
          <table:table-cell table:style-name="ce66" table:formula="of:=INDEX([Indices.$B$2:.$B$100]; MATCH([.D53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1644" calcext:value-type="float">
            <text:p>5131644</text:p>
          </table:table-cell>
          <table:table-cell table:style-name="ce15" office:value-type="string" calcext:value-type="string">
            <text:p><text:a xlink:href="https://maya.tase.co.il/he/funds/mutual-funds/5131644" xlink:type="simple">https://maya.tase.co.il/he/funds/mutual-funds/5131644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54])); &quot;קרן סל&quot;; ISNUMBER(SEARCH(&quot;/mutual-funds/&quot;; [.C54])); &quot;קרן&quot;; ISNUMBER(SEARCH(&quot;/market_data/security/&quot;; [.C54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3181" calcext:value-type="percentage">
            <text:p>31.81%</text:p>
          </table:table-cell>
          <table:table-cell table:style-name="ce39" table:formula="of:=SUM([.F54]-[.N54])" office:value-type="percentage" office:value="-0.0583" calcext:value-type="percentage">
            <text:p>-5.83%</text:p>
          </table:table-cell>
          <table:table-cell table:style-name="ce52" table:formula="of:=SUM([.K54]+[.L54]+[.M54])" office:value-type="percentage" office:value="0.00615" calcext:value-type="percentage">
            <text:p>0.61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number-columns-repeated="2" table:style-name="ce52" office:value-type="percentage" office:value="0.003" calcext:value-type="percentage">
            <text:p>0.3%</text:p>
          </table:table-cell>
          <table:table-cell table:style-name="ce52" office:value-type="percentage" office:value="0.00015" calcext:value-type="percentage">
            <text:p>0.015%</text:p>
          </table:table-cell>
          <table:table-cell table:style-name="ce66" table:formula="of:=INDEX([Indices.$B$2:.$B$100]; MATCH([.D54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2098" calcext:value-type="float">
            <text:p>5122098</text:p>
          </table:table-cell>
          <table:table-cell table:style-name="ce13" office:value-type="string" calcext:value-type="string">
            <text:p><text:a xlink:href="https://maya.tase.co.il/he/funds/mutual-funds/5122098" xlink:type="simple">https://maya.tase.co.il/he/funds/mutual-funds/5122098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55])); &quot;קרן סל&quot;; ISNUMBER(SEARCH(&quot;/mutual-funds/&quot;; [.C55])); &quot;קרן&quot;; ISNUMBER(SEARCH(&quot;/market_data/security/&quot;; [.C55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3144" calcext:value-type="percentage">
            <text:p>31.44%</text:p>
          </table:table-cell>
          <table:table-cell table:style-name="ce38" table:formula="of:=SUM([.F55]-[.N55])" office:value-type="percentage" office:value="-0.062" calcext:value-type="percentage">
            <text:p>-6.20%</text:p>
          </table:table-cell>
          <table:table-cell table:style-name="ce51" table:formula="of:=SUM([.K55]+[.L55]+[.M55])" office:value-type="percentage" office:value="0.0052" calcext:value-type="percentage">
            <text:p>0.52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5" calcext:value-type="percentage">
            <text:p>0.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55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65844" calcext:value-type="float">
            <text:p>1165844</text:p>
          </table:table-cell>
          <table:table-cell table:style-name="ce15" office:value-type="string" calcext:value-type="string">
            <text:p><text:a xlink:href="https://market.tase.co.il/he/market_data/etf/1165844/major_data" xlink:type="simple">https://market.tase.co.il/he/market_data/etf/1165844/major_data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56])); &quot;קרן סל&quot;; ISNUMBER(SEARCH(&quot;/mutual-funds/&quot;; [.C56])); &quot;קרן&quot;; ISNUMBER(SEARCH(&quot;/market_data/security/&quot;; [.C56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3113" calcext:value-type="percentage">
            <text:p>31.13%</text:p>
          </table:table-cell>
          <table:table-cell table:style-name="ce39" table:formula="of:=SUM([.F56]-[.N56])" office:value-type="percentage" office:value="-0.0651" calcext:value-type="percentage">
            <text:p>-6.51%</text:p>
          </table:table-cell>
          <table:table-cell table:style-name="ce52" table:formula="of:=SUM([.K56]+[.L56]+[.M56])" office:value-type="percentage" office:value="0.0042" calcext:value-type="percentage">
            <text:p>0.42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1" calcext:value-type="percentage">
            <text:p>0.1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56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201698" calcext:value-type="float">
            <text:p>1201698</text:p>
          </table:table-cell>
          <table:table-cell table:style-name="ce13" office:value-type="string" calcext:value-type="string">
            <text:p><text:a xlink:href="https://market.tase.co.il/he/market_data/etf/1201698/major_data" xlink:type="simple">https://market.tase.co.il/he/market_data/etf/1201698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57])); &quot;קרן סל&quot;; ISNUMBER(SEARCH(&quot;/mutual-funds/&quot;; [.C57])); &quot;קרן&quot;; ISNUMBER(SEARCH(&quot;/market_data/security/&quot;; [.C57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3095" calcext:value-type="percentage">
            <text:p>30.95%</text:p>
          </table:table-cell>
          <table:table-cell table:style-name="ce38" table:formula="of:=SUM([.F57]-[.N57])" office:value-type="percentage" office:value="-0.0669" calcext:value-type="percentage">
            <text:p>-6.69%</text:p>
          </table:table-cell>
          <table:table-cell table:style-name="ce51" table:formula="of:=SUM([.K57]+[.L57]+[.M57])" office:value-type="percentage" office:value="0.0032" calcext:value-type="percentage">
            <text:p>0.32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57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81445" calcext:value-type="float">
            <text:p>1181445</text:p>
          </table:table-cell>
          <table:table-cell table:style-name="ce15" office:value-type="string" calcext:value-type="string">
            <text:p><text:a xlink:href="https://market.tase.co.il/he/market_data/etf/1181445/major_data" xlink:type="simple">https://market.tase.co.il/he/market_data/etf/1181445/major_data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58])); &quot;קרן סל&quot;; ISNUMBER(SEARCH(&quot;/mutual-funds/&quot;; [.C58])); &quot;קרן&quot;; ISNUMBER(SEARCH(&quot;/market_data/security/&quot;; [.C58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304" calcext:value-type="percentage">
            <text:p>30.40%</text:p>
          </table:table-cell>
          <table:table-cell table:style-name="ce39" table:formula="of:=SUM([.F58]-[.N58])" office:value-type="percentage" office:value="-0.0724" calcext:value-type="percentage">
            <text:p>-7.24%</text:p>
          </table:table-cell>
          <table:table-cell table:style-name="ce52" table:formula="of:=SUM([.K58]+[.L58]+[.M58])" office:value-type="percentage" office:value="0.0032" calcext:value-type="percentage">
            <text:p>0.32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58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9103" calcext:value-type="float">
            <text:p>1149103</text:p>
          </table:table-cell>
          <table:table-cell table:style-name="ce13" office:value-type="string" calcext:value-type="string">
            <text:p><text:a xlink:href="https://market.tase.co.il/he/market_data/etf/1149103/major_data" xlink:type="simple">https://market.tase.co.il/he/market_data/etf/1149103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59])); &quot;קרן סל&quot;; ISNUMBER(SEARCH(&quot;/mutual-funds/&quot;; [.C59])); &quot;קרן&quot;; ISNUMBER(SEARCH(&quot;/market_data/security/&quot;; [.C59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3011" calcext:value-type="percentage">
            <text:p>30.11%</text:p>
          </table:table-cell>
          <table:table-cell table:style-name="ce38" table:formula="of:=SUM([.F59]-[.N59])" office:value-type="percentage" office:value="-0.0753" calcext:value-type="percentage">
            <text:p>-7.53%</text:p>
          </table:table-cell>
          <table:table-cell table:style-name="ce51" table:formula="of:=SUM([.K59]+[.L59]+[.M59])" office:value-type="percentage" office:value="0.01115" calcext:value-type="percentage">
            <text:p>1.115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8" calcext:value-type="percentage">
            <text:p>0.8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15" calcext:value-type="percentage">
            <text:p>0.015%</text:p>
          </table:table-cell>
          <table:table-cell table:style-name="ce65" table:formula="of:=INDEX([Indices.$B$2:.$B$100]; MATCH([.D59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6612" calcext:value-type="float">
            <text:p>1146612</text:p>
          </table:table-cell>
          <table:table-cell table:style-name="ce13" office:value-type="string" calcext:value-type="string">
            <text:p><text:a xlink:href="https://market.tase.co.il/he/market_data/etf/1146612/major_data" xlink:type="simple">https://market.tase.co.il/he/market_data/etf/1146612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60])); &quot;קרן סל&quot;; ISNUMBER(SEARCH(&quot;/mutual-funds/&quot;; [.C60])); &quot;קרן&quot;; ISNUMBER(SEARCH(&quot;/market_data/security/&quot;; [.C60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2972" calcext:value-type="percentage">
            <text:p>29.72%</text:p>
          </table:table-cell>
          <table:table-cell table:style-name="ce38" table:formula="of:=SUM([.F60]-[.N60])" office:value-type="percentage" office:value="-0.0792" calcext:value-type="percentage">
            <text:p>-7.92%</text:p>
          </table:table-cell>
          <table:table-cell table:style-name="ce51" table:formula="of:=SUM([.K60]+[.L60]+[.M60])" office:value-type="percentage" office:value="0.0122" calcext:value-type="percentage">
            <text:p>1.22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89" calcext:value-type="percentage">
            <text:p>0.89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60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200443" calcext:value-type="float">
            <text:p>1200443</text:p>
          </table:table-cell>
          <table:table-cell table:style-name="ce15" office:value-type="string" calcext:value-type="string">
            <text:p><text:a xlink:href="https://market.tase.co.il/he/market_data/etf/1200443/major_data" xlink:type="simple">https://market.tase.co.il/he/market_data/etf/1200443/major_data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61])); &quot;קרן סל&quot;; ISNUMBER(SEARCH(&quot;/mutual-funds/&quot;; [.C61])); &quot;קרן&quot;; ISNUMBER(SEARCH(&quot;/market_data/security/&quot;; [.C61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297" calcext:value-type="percentage">
            <text:p>29.70%</text:p>
          </table:table-cell>
          <table:table-cell table:style-name="ce39" table:formula="of:=SUM([.F61]-[.N61])" office:value-type="percentage" office:value="-0.0794" calcext:value-type="percentage">
            <text:p>-7.94%</text:p>
          </table:table-cell>
          <table:table-cell table:style-name="ce52" table:formula="of:=SUM([.K61]+[.L61]+[.M61])" office:value-type="percentage" office:value="0.0031" calcext:value-type="percentage">
            <text:p>0.31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1" calcext:value-type="percentage">
            <text:p>0.01%</text:p>
          </table:table-cell>
          <table:table-cell table:style-name="ce66" table:formula="of:=INDEX([Indices.$B$2:.$B$100]; MATCH([.D61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3734" calcext:value-type="float">
            <text:p>1143734</text:p>
          </table:table-cell>
          <table:table-cell table:style-name="ce13" office:value-type="string" calcext:value-type="string">
            <text:p><text:a xlink:href="https://market.tase.co.il/he/market_data/etf/1143734/major_data" xlink:type="simple">https://market.tase.co.il/he/market_data/etf/1143734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62])); &quot;קרן סל&quot;; ISNUMBER(SEARCH(&quot;/mutual-funds/&quot;; [.C62])); &quot;קרן&quot;; ISNUMBER(SEARCH(&quot;/market_data/security/&quot;; [.C62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2939" calcext:value-type="percentage">
            <text:p>29.39%</text:p>
          </table:table-cell>
          <table:table-cell table:style-name="ce38" table:formula="of:=SUM([.F62]-[.N62])" office:value-type="percentage" office:value="-0.0825" calcext:value-type="percentage">
            <text:p>-8.25%</text:p>
          </table:table-cell>
          <table:table-cell table:style-name="ce51" table:formula="of:=SUM([.K62]+[.L62]+[.M62])" office:value-type="percentage" office:value="0.0113" calcext:value-type="percentage">
            <text:p>1.13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8" calcext:value-type="percentage">
            <text:p>0.8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62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67568" calcext:value-type="float">
            <text:p>1167568</text:p>
          </table:table-cell>
          <table:table-cell table:style-name="ce15" office:value-type="string" calcext:value-type="string">
            <text:p><text:a xlink:href="https://market.tase.co.il/he/market_data/etf/1167568/major_data" xlink:type="simple">https://market.tase.co.il/he/market_data/etf/1167568/major_data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63])); &quot;קרן סל&quot;; ISNUMBER(SEARCH(&quot;/mutual-funds/&quot;; [.C63])); &quot;קרן&quot;; ISNUMBER(SEARCH(&quot;/market_data/security/&quot;; [.C63])); &quot;קרן חוץ&quot;; 1; &quot;&quot;)" office:value-type="string" office:string-value="קרן סל" calcext:value-type="string">
            <text:p>קרן סל</text:p>
          </table:table-cell>
          <table:table-cell table:style-name="ce39" table:formula="of:=SUM(81.27% / 3)" office:value-type="percentage" office:value="0.2709" calcext:value-type="percentage">
            <text:p>27.09%</text:p>
          </table:table-cell>
          <table:table-cell table:style-name="ce39" table:formula="of:=SUM([.F63]-[.N63])" office:value-type="percentage" office:value="-0.1055" calcext:value-type="percentage">
            <text:p>-10.55%</text:p>
          </table:table-cell>
          <table:table-cell table:style-name="ce52" table:formula="of:=SUM([.K63]+[.L63]+[.M63])" office:value-type="percentage" office:value="0.02525" calcext:value-type="percentage">
            <text:p>2.525%</text:p>
          </table:table-cell>
          <table:table-cell table:style-name="ce56" table:content-validation-name="val4" office:value-type="string" calcext:value-type="string">
            <text:p>6A</text:p>
          </table:table-cell>
          <table:table-cell table:style-name="ce62" office:value-type="string" calcext:value-type="string">
            <text:p>חשיפה 300% (חולק ב 3)</text:p>
          </table:table-cell>
          <table:table-cell table:style-name="ce52" office:value-type="percentage" office:value="0.025" calcext:value-type="percentage">
            <text:p>2.5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25" calcext:value-type="percentage">
            <text:p>0.025%</text:p>
          </table:table-cell>
          <table:table-cell table:style-name="ce66" table:formula="of:=INDEX([Indices.$B$2:.$B$100]; MATCH([.D63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87079" calcext:value-type="float">
            <text:p>1187079</text:p>
          </table:table-cell>
          <table:table-cell table:style-name="ce13" office:value-type="string" calcext:value-type="string">
            <text:p><text:a xlink:href="https://market.tase.co.il/he/market_data/etf/1187079/major_data" xlink:type="simple">https://market.tase.co.il/he/market_data/etf/1187079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64])); &quot;קרן סל&quot;; ISNUMBER(SEARCH(&quot;/mutual-funds/&quot;; [.C64])); &quot;קרן&quot;; ISNUMBER(SEARCH(&quot;/market_data/security/&quot;; [.C64])); &quot;קרן חוץ&quot;; 1; &quot;&quot;)" office:value-type="string" office:string-value="קרן סל" calcext:value-type="string">
            <text:p>קרן סל</text:p>
          </table:table-cell>
          <table:table-cell table:style-name="ce38" table:formula="of:=SUM(57.41% / 3)" office:value-type="percentage" office:value="0.191366666666667" calcext:value-type="percentage">
            <text:p>19.14%</text:p>
          </table:table-cell>
          <table:table-cell table:style-name="ce38" table:formula="of:=SUM([.F64]-[.N64])" office:value-type="percentage" office:value="-0.185033333333333" calcext:value-type="percentage">
            <text:p>-18.50%</text:p>
          </table:table-cell>
          <table:table-cell table:style-name="ce51" table:formula="of:=SUM([.K64]+[.L64]+[.M64])" office:value-type="percentage" office:value="0.0138" calcext:value-type="percentage">
            <text:p>1.38%</text:p>
          </table:table-cell>
          <table:table-cell table:style-name="ce55" table:content-validation-name="val4" office:value-type="string" calcext:value-type="string">
            <text:p>6D + דולר</text:p>
          </table:table-cell>
          <table:table-cell table:style-name="ce61" office:value-type="string" calcext:value-type="string">
            <text:p>חשיפה 300% (חולק ב 3)</text:p>
          </table:table-cell>
          <table:table-cell table:style-name="ce51" office:value-type="percentage" office:value="0.0135" calcext:value-type="percentage">
            <text:p>1.3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64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6976" calcext:value-type="float">
            <text:p>1146976</text:p>
          </table:table-cell>
          <table:table-cell table:style-name="ce13" office:value-type="string" calcext:value-type="string">
            <text:p><text:a xlink:href="https://market.tase.co.il/he/market_data/etf/1146976/major_data" xlink:type="simple">https://market.tase.co.il/he/market_data/etf/1146976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65])); &quot;קרן סל&quot;; ISNUMBER(SEARCH(&quot;/mutual-funds/&quot;; [.C65])); &quot;קרן&quot;; ISNUMBER(SEARCH(&quot;/market_data/security/&quot;; [.C65])); &quot;קרן חוץ&quot;; 1; &quot;&quot;)" office:value-type="string" office:string-value="קרן סל" calcext:value-type="string">
            <text:p>קרן סל</text:p>
          </table:table-cell>
          <table:table-cell table:style-name="ce38" table:formula="of:=SUM(55.26%/ 3)" office:value-type="percentage" office:value="0.1842" calcext:value-type="percentage">
            <text:p>18.42%</text:p>
          </table:table-cell>
          <table:table-cell table:style-name="ce38" table:formula="of:=SUM([.F65]-[.N65])" office:value-type="percentage" office:value="-0.1922" calcext:value-type="percentage">
            <text:p>-19.22%</text:p>
          </table:table-cell>
          <table:table-cell table:style-name="ce51" table:formula="of:=SUM([.K65]+[.L65]+[.M65])" office:value-type="percentage" office:value="0.0278" calcext:value-type="percentage">
            <text:p>2.78%</text:p>
          </table:table-cell>
          <table:table-cell table:style-name="ce55" table:content-validation-name="val4" office:value-type="string" calcext:value-type="string">
            <text:p>6D + דולר</text:p>
          </table:table-cell>
          <table:table-cell table:style-name="ce61" office:value-type="string" calcext:value-type="string">
            <text:p>חשיפה 300% (חולק ב 3)</text:p>
          </table:table-cell>
          <table:table-cell table:style-name="ce51" office:value-type="percentage" office:value="0.0275" calcext:value-type="percentage">
            <text:p>2.7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65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8905" calcext:value-type="float">
            <text:p>5128905</text:p>
          </table:table-cell>
          <table:table-cell table:style-name="ce13" office:value-type="string" calcext:value-type="string">
            <text:p><text:a xlink:href="https://maya.tase.co.il/he/funds/mutual-funds/5128905" xlink:type="simple">https://maya.tase.co.il/he/funds/mutual-funds/5128905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66])); &quot;קרן סל&quot;; ISNUMBER(SEARCH(&quot;/mutual-funds/&quot;; [.C66])); &quot;קרן&quot;; ISNUMBER(SEARCH(&quot;/market_data/security/&quot;; [.C66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1348" calcext:value-type="percentage">
            <text:p>13.48%</text:p>
          </table:table-cell>
          <table:table-cell table:style-name="ce38" table:formula="of:=SUM([.F66]-[.N66])" office:value-type="percentage" office:value="-0.2416" calcext:value-type="percentage">
            <text:p>-24.16%</text:p>
          </table:table-cell>
          <table:table-cell table:style-name="ce51" table:formula="of:=SUM([.K66]+[.L66]+[.M66])" office:value-type="percentage" office:value="0.00225" calcext:value-type="percentage">
            <text:p>0.225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2" calcext:value-type="percentage">
            <text:p>0.2%</text:p>
          </table:table-cell>
          <table:table-cell table:style-name="ce51" office:value-type="percentage" office:value="0.00025" calcext:value-type="percentage">
            <text:p>0.025%</text:p>
          </table:table-cell>
          <table:table-cell table:style-name="ce65" table:formula="of:=INDEX([Indices.$B$2:.$B$100]; MATCH([.D66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9811" calcext:value-type="float">
            <text:p>5139811</text:p>
          </table:table-cell>
          <table:table-cell table:style-name="ce15" office:value-type="string" calcext:value-type="string">
            <text:p><text:a xlink:href="https://maya.tase.co.il/he/funds/mutual-funds/5139811" xlink:type="simple">https://maya.tase.co.il/he/funds/mutual-funds/5139811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67])); &quot;קרן סל&quot;; ISNUMBER(SEARCH(&quot;/mutual-funds/&quot;; [.C67])); &quot;קרן&quot;; ISNUMBER(SEARCH(&quot;/market_data/security/&quot;; [.C67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1345" calcext:value-type="percentage">
            <text:p>13.45%</text:p>
          </table:table-cell>
          <table:table-cell table:style-name="ce39" table:formula="of:=SUM([.F67]-[.N67])" office:value-type="percentage" office:value="-0.2419" calcext:value-type="percentage">
            <text:p>-24.19%</text:p>
          </table:table-cell>
          <table:table-cell table:style-name="ce52" table:formula="of:=SUM([.K67]+[.L67]+[.M67])" office:value-type="percentage" office:value="0.0003" calcext:value-type="percentage">
            <text:p>0.03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67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9283" calcext:value-type="float">
            <text:p>5129283</text:p>
          </table:table-cell>
          <table:table-cell table:style-name="ce13" office:value-type="string" calcext:value-type="string">
            <text:p><text:a xlink:href="https://maya.tase.co.il/he/funds/mutual-funds/5129283" xlink:type="simple">https://maya.tase.co.il/he/funds/mutual-funds/5129283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68])); &quot;קרן סל&quot;; ISNUMBER(SEARCH(&quot;/mutual-funds/&quot;; [.C68])); &quot;קרן&quot;; ISNUMBER(SEARCH(&quot;/market_data/security/&quot;; [.C68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1335" calcext:value-type="percentage">
            <text:p>13.35%</text:p>
          </table:table-cell>
          <table:table-cell table:style-name="ce38" table:formula="of:=SUM([.F68]-[.N68])" office:value-type="percentage" office:value="-0.2429" calcext:value-type="percentage">
            <text:p>-24.29%</text:p>
          </table:table-cell>
          <table:table-cell table:style-name="ce51" table:formula="of:=SUM([.K68]+[.L68]+[.M68])" office:value-type="percentage" office:value="0.00125" calcext:value-type="percentage">
            <text:p>0.125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1" calcext:value-type="percentage">
            <text:p>0.1%</text:p>
          </table:table-cell>
          <table:table-cell table:style-name="ce51" office:value-type="percentage" office:value="0.00025" calcext:value-type="percentage">
            <text:p>0.025%</text:p>
          </table:table-cell>
          <table:table-cell table:style-name="ce65" table:formula="of:=INDEX([Indices.$B$2:.$B$100]; MATCH([.D68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4531" calcext:value-type="float">
            <text:p>5134531</text:p>
          </table:table-cell>
          <table:table-cell table:style-name="ce15" office:value-type="string" calcext:value-type="string">
            <text:p><text:a xlink:href="https://maya.tase.co.il/he/funds/mutual-funds/5134531" xlink:type="simple">https://maya.tase.co.il/he/funds/mutual-funds/5134531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69])); &quot;קרן סל&quot;; ISNUMBER(SEARCH(&quot;/mutual-funds/&quot;; [.C69])); &quot;קרן&quot;; ISNUMBER(SEARCH(&quot;/market_data/security/&quot;; [.C69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1315" calcext:value-type="percentage">
            <text:p>13.15%</text:p>
          </table:table-cell>
          <table:table-cell table:style-name="ce39" table:formula="of:=SUM([.F69]-[.N69])" office:value-type="percentage" office:value="-0.2449" calcext:value-type="percentage">
            <text:p>-24.49%</text:p>
          </table:table-cell>
          <table:table-cell table:style-name="ce52" table:formula="of:=SUM([.K69]+[.L69]+[.M69])" office:value-type="percentage" office:value="0.00325" calcext:value-type="percentage">
            <text:p>0.325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5" calcext:value-type="percentage">
            <text:p>0.025%</text:p>
          </table:table-cell>
          <table:table-cell table:style-name="ce66" table:formula="of:=INDEX([Indices.$B$2:.$B$100]; MATCH([.D69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7766" calcext:value-type="float">
            <text:p>5127766</text:p>
          </table:table-cell>
          <table:table-cell table:style-name="ce13" office:value-type="string" calcext:value-type="string">
            <text:p><text:a xlink:href="https://maya.tase.co.il/he/funds/mutual-funds/5127766" xlink:type="simple">https://maya.tase.co.il/he/funds/mutual-funds/5127766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70])); &quot;קרן סל&quot;; ISNUMBER(SEARCH(&quot;/mutual-funds/&quot;; [.C70])); &quot;קרן&quot;; ISNUMBER(SEARCH(&quot;/market_data/security/&quot;; [.C70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13" calcext:value-type="percentage">
            <text:p>13.00%</text:p>
          </table:table-cell>
          <table:table-cell table:style-name="ce38" table:formula="of:=SUM([.F70]-[.N70])" office:value-type="percentage" office:value="-0.2464" calcext:value-type="percentage">
            <text:p>-24.64%</text:p>
          </table:table-cell>
          <table:table-cell table:style-name="ce51" table:formula="of:=SUM([.K70]+[.L70]+[.M70])" office:value-type="percentage" office:value="0.00625" calcext:value-type="percentage">
            <text:p>0.625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number-columns-repeated="2" table:style-name="ce51" office:value-type="percentage" office:value="0.003" calcext:value-type="percentage">
            <text:p>0.3%</text:p>
          </table:table-cell>
          <table:table-cell table:style-name="ce51" office:value-type="percentage" office:value="0.00025" calcext:value-type="percentage">
            <text:p>0.025%</text:p>
          </table:table-cell>
          <table:table-cell table:style-name="ce65" table:formula="of:=INDEX([Indices.$B$2:.$B$100]; MATCH([.D70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24532" calcext:value-type="float">
            <text:p>5124532</text:p>
          </table:table-cell>
          <table:table-cell table:style-name="ce15" office:value-type="string" calcext:value-type="string">
            <text:p><text:a xlink:href="https://maya.tase.co.il/he/funds/mutual-funds/5124532" xlink:type="simple">https://maya.tase.co.il/he/funds/mutual-funds/5124532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71])); &quot;קרן סל&quot;; ISNUMBER(SEARCH(&quot;/mutual-funds/&quot;; [.C71])); &quot;קרן&quot;; ISNUMBER(SEARCH(&quot;/market_data/security/&quot;; [.C71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1299" calcext:value-type="percentage">
            <text:p>12.99%</text:p>
          </table:table-cell>
          <table:table-cell table:style-name="ce39" table:formula="of:=SUM([.F71]-[.N71])" office:value-type="percentage" office:value="-0.2465" calcext:value-type="percentage">
            <text:p>-24.65%</text:p>
          </table:table-cell>
          <table:table-cell table:style-name="ce52" table:formula="of:=SUM([.K71]+[.L71]+[.M71])" office:value-type="percentage" office:value="0.0063" calcext:value-type="percentage">
            <text:p>0.63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number-columns-repeated="2"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71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17585" calcext:value-type="float">
            <text:p>5117585</text:p>
          </table:table-cell>
          <table:table-cell table:style-name="ce13" office:value-type="string" calcext:value-type="string">
            <text:p><text:a xlink:href="https://maya.tase.co.il/he/funds/mutual-funds/5117585" xlink:type="simple">https://maya.tase.co.il/he/funds/mutual-funds/5117585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72])); &quot;קרן סל&quot;; ISNUMBER(SEARCH(&quot;/mutual-funds/&quot;; [.C72])); &quot;קרן&quot;; ISNUMBER(SEARCH(&quot;/market_data/security/&quot;; [.C72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1272" calcext:value-type="percentage">
            <text:p>12.72%</text:p>
          </table:table-cell>
          <table:table-cell table:style-name="ce38" table:formula="of:=SUM([.F72]-[.N72])" office:value-type="percentage" office:value="-0.2492" calcext:value-type="percentage">
            <text:p>-24.92%</text:p>
          </table:table-cell>
          <table:table-cell table:style-name="ce51" table:formula="of:=SUM([.K72]+[.L72]+[.M72])" office:value-type="percentage" office:value="0.0052" calcext:value-type="percentage">
            <text:p>0.52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5" calcext:value-type="percentage">
            <text:p>0.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72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81387" calcext:value-type="float">
            <text:p>1181387</text:p>
          </table:table-cell>
          <table:table-cell table:style-name="ce15" office:value-type="string" calcext:value-type="string">
            <text:p><text:a xlink:href="https://market.tase.co.il/he/market_data/etf/1181387/major_data" xlink:type="simple">https://market.tase.co.il/he/market_data/etf/1181387/major_data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73])); &quot;קרן סל&quot;; ISNUMBER(SEARCH(&quot;/mutual-funds/&quot;; [.C73])); &quot;קרן&quot;; ISNUMBER(SEARCH(&quot;/market_data/security/&quot;; [.C73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0999" calcext:value-type="percentage">
            <text:p>9.99%</text:p>
          </table:table-cell>
          <table:table-cell table:style-name="ce39" table:formula="of:=SUM([.F73]-[.N73])" office:value-type="percentage" office:value="-0.2765" calcext:value-type="percentage">
            <text:p>-27.65%</text:p>
          </table:table-cell>
          <table:table-cell table:style-name="ce52" table:formula="of:=SUM([.K73]+[.L73]+[.M73])" office:value-type="percentage" office:value="0.0032" calcext:value-type="percentage">
            <text:p>0.32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73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200450" calcext:value-type="float">
            <text:p>1200450</text:p>
          </table:table-cell>
          <table:table-cell table:style-name="ce13" office:value-type="string" calcext:value-type="string">
            <text:p><text:a xlink:href="https://market.tase.co.il/he/market_data/etf/1200450/major_data" xlink:type="simple">https://market.tase.co.il/he/market_data/etf/1200450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74])); &quot;קרן סל&quot;; ISNUMBER(SEARCH(&quot;/mutual-funds/&quot;; [.C74])); &quot;קרן&quot;; ISNUMBER(SEARCH(&quot;/market_data/security/&quot;; [.C74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983" calcext:value-type="percentage">
            <text:p>9.83%</text:p>
          </table:table-cell>
          <table:table-cell table:style-name="ce38" table:formula="of:=SUM([.F74]-[.N74])" office:value-type="percentage" office:value="-0.2781" calcext:value-type="percentage">
            <text:p>-27.81%</text:p>
          </table:table-cell>
          <table:table-cell table:style-name="ce51" table:formula="of:=SUM([.K74]+[.L74]+[.M74])" office:value-type="percentage" office:value="0.0031" calcext:value-type="percentage">
            <text:p>0.31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65" table:formula="of:=INDEX([Indices.$B$2:.$B$100]; MATCH([.D74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65836" calcext:value-type="float">
            <text:p>1165836</text:p>
          </table:table-cell>
          <table:table-cell table:style-name="ce15" office:value-type="string" calcext:value-type="string">
            <text:p><text:a xlink:href="https://market.tase.co.il/he/market_data/etf/1165836/major_data" xlink:type="simple">https://market.tase.co.il/he/market_data/etf/1165836/major_data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75])); &quot;קרן סל&quot;; ISNUMBER(SEARCH(&quot;/mutual-funds/&quot;; [.C75])); &quot;קרן&quot;; ISNUMBER(SEARCH(&quot;/market_data/security/&quot;; [.C75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0976" calcext:value-type="percentage">
            <text:p>9.76%</text:p>
          </table:table-cell>
          <table:table-cell table:style-name="ce39" table:formula="of:=SUM([.F75]-[.N75])" office:value-type="percentage" office:value="-0.2788" calcext:value-type="percentage">
            <text:p>-27.88%</text:p>
          </table:table-cell>
          <table:table-cell table:style-name="ce52" table:formula="of:=SUM([.K75]+[.L75]+[.M75])" office:value-type="percentage" office:value="0.0042" calcext:value-type="percentage">
            <text:p>0.42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1" calcext:value-type="percentage">
            <text:p>0.1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75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201672" calcext:value-type="float">
            <text:p>1201672</text:p>
          </table:table-cell>
          <table:table-cell table:style-name="ce13" office:value-type="string" calcext:value-type="string">
            <text:p><text:a xlink:href="https://market.tase.co.il/he/market_data/etf/1201672/major_data" xlink:type="simple">https://market.tase.co.il/he/market_data/etf/1201672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76])); &quot;קרן סל&quot;; ISNUMBER(SEARCH(&quot;/mutual-funds/&quot;; [.C76])); &quot;קרן&quot;; ISNUMBER(SEARCH(&quot;/market_data/security/&quot;; [.C76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956" calcext:value-type="percentage">
            <text:p>9.56%</text:p>
          </table:table-cell>
          <table:table-cell table:style-name="ce38" table:formula="of:=SUM([.F76]-[.N76])" office:value-type="percentage" office:value="-0.2808" calcext:value-type="percentage">
            <text:p>-28.08%</text:p>
          </table:table-cell>
          <table:table-cell table:style-name="ce51" table:formula="of:=SUM([.K76]+[.L76]+[.M76])" office:value-type="percentage" office:value="0.0032" calcext:value-type="percentage">
            <text:p>0.32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76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9038" calcext:value-type="float">
            <text:p>1149038</text:p>
          </table:table-cell>
          <table:table-cell table:style-name="ce15" office:value-type="string" calcext:value-type="string">
            <text:p><text:a xlink:href="https://market.tase.co.il/he/market_data/etf/1149038/major_data" xlink:type="simple">https://market.tase.co.il/he/market_data/etf/1149038/major_data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77])); &quot;קרן סל&quot;; ISNUMBER(SEARCH(&quot;/mutual-funds/&quot;; [.C77])); &quot;קרן&quot;; ISNUMBER(SEARCH(&quot;/market_data/security/&quot;; [.C77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0953" calcext:value-type="percentage">
            <text:p>9.53%</text:p>
          </table:table-cell>
          <table:table-cell table:style-name="ce39" table:formula="of:=SUM([.F77]-[.N77])" office:value-type="percentage" office:value="-0.2811" calcext:value-type="percentage">
            <text:p>-28.11%</text:p>
          </table:table-cell>
          <table:table-cell table:style-name="ce52" table:formula="of:=SUM([.K77]+[.L77]+[.M77])" office:value-type="percentage" office:value="0.0101" calcext:value-type="percentage">
            <text:p>1.01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7" calcext:value-type="percentage">
            <text:p>0.7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1" calcext:value-type="percentage">
            <text:p>0.01%</text:p>
          </table:table-cell>
          <table:table-cell table:style-name="ce66" table:formula="of:=INDEX([Indices.$B$2:.$B$100]; MATCH([.D77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6505" calcext:value-type="float">
            <text:p>1146505</text:p>
          </table:table-cell>
          <table:table-cell table:style-name="ce13" office:value-type="string" calcext:value-type="string">
            <text:p><text:a xlink:href="https://market.tase.co.il/he/market_data/etf/1146505/major_data" xlink:type="simple">https://market.tase.co.il/he/market_data/etf/1146505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78])); &quot;קרן סל&quot;; ISNUMBER(SEARCH(&quot;/mutual-funds/&quot;; [.C78])); &quot;קרן&quot;; ISNUMBER(SEARCH(&quot;/market_data/security/&quot;; [.C78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942" calcext:value-type="percentage">
            <text:p>9.42%</text:p>
          </table:table-cell>
          <table:table-cell table:style-name="ce38" table:formula="of:=SUM([.F78]-[.N78])" office:value-type="percentage" office:value="-0.2822" calcext:value-type="percentage">
            <text:p>-28.22%</text:p>
          </table:table-cell>
          <table:table-cell table:style-name="ce51" table:formula="of:=SUM([.K78]+[.L78]+[.M78])" office:value-type="percentage" office:value="0.0092" calcext:value-type="percentage">
            <text:p>0.92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59" calcext:value-type="percentage">
            <text:p>0.59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78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4401" calcext:value-type="float">
            <text:p>1144401</text:p>
          </table:table-cell>
          <table:table-cell table:style-name="ce13" office:value-type="string" calcext:value-type="string">
            <text:p><text:a xlink:href="https://market.tase.co.il/he/market_data/etf/1144401/major_data" xlink:type="simple">https://market.tase.co.il/he/market_data/etf/1144401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79])); &quot;קרן סל&quot;; ISNUMBER(SEARCH(&quot;/mutual-funds/&quot;; [.C79])); &quot;קרן&quot;; ISNUMBER(SEARCH(&quot;/market_data/security/&quot;; [.C79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913" calcext:value-type="percentage">
            <text:p>9.13%</text:p>
          </table:table-cell>
          <table:table-cell table:style-name="ce38" table:formula="of:=SUM([.F79]-[.N79])" office:value-type="percentage" office:value="-0.2851" calcext:value-type="percentage">
            <text:p>-28.51%</text:p>
          </table:table-cell>
          <table:table-cell table:style-name="ce51" table:formula="of:=SUM([.K79]+[.L79]+[.M79])" office:value-type="percentage" office:value="0.0103" calcext:value-type="percentage">
            <text:p>1.03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7" calcext:value-type="percentage">
            <text:p>0.7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79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41569" calcext:value-type="float">
            <text:p>5141569</text:p>
          </table:table-cell>
          <table:table-cell table:style-name="ce15" office:value-type="string" calcext:value-type="string">
            <text:p><text:a xlink:href="https://maya.tase.co.il/he/funds/mutual-funds/5141569" xlink:type="simple">https://maya.tase.co.il/he/funds/mutual-funds/5141569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80])); &quot;קרן סל&quot;; ISNUMBER(SEARCH(&quot;/mutual-funds/&quot;; [.C80])); &quot;קרן&quot;; ISNUMBER(SEARCH(&quot;/market_data/security/&quot;; [.C80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table:formula="of:=SUM([.F80]-[.N80])" office:value-type="percentage" office:value="-0.3764" calcext:value-type="percentage">
            <text:p>-37.64%</text:p>
          </table:table-cell>
          <table:table-cell table:style-name="ce52" table:formula="of:=SUM([.K80]+[.L80]+[.M80])" office:value-type="percentage" office:value="0.00015" calcext:value-type="percentage">
            <text:p>0.01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 office:value-type="string" calcext:value-type="string">
            <text:p>אין נתון לשנה</text:p>
          </table:table-cell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15" calcext:value-type="percentage">
            <text:p>0.015%</text:p>
          </table:table-cell>
          <table:table-cell table:style-name="ce66" table:formula="of:=INDEX([Indices.$B$2:.$B$100]; MATCH([.D80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42153" calcext:value-type="float">
            <text:p>5142153</text:p>
          </table:table-cell>
          <table:table-cell table:style-name="ce13" office:value-type="string" calcext:value-type="string">
            <text:p><text:a xlink:href="https://maya.tase.co.il/he/funds/mutual-funds/5142153" xlink:type="simple">https://maya.tase.co.il/he/funds/mutual-funds/5142153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81])); &quot;קרן סל&quot;; ISNUMBER(SEARCH(&quot;/mutual-funds/&quot;; [.C81])); &quot;קרן&quot;; ISNUMBER(SEARCH(&quot;/market_data/security/&quot;; [.C81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8" table:formula="of:=SUM([.F81]-[.N81])" office:value-type="percentage" office:value="-0.3764" calcext:value-type="percentage">
            <text:p>-37.64%</text:p>
          </table:table-cell>
          <table:table-cell table:style-name="ce51" table:formula="of:=SUM([.K81]+[.L81]+[.M81])" office:value-type="percentage" office:value="0.0002" calcext:value-type="percentage">
            <text:p>0.02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 office:value-type="string" calcext:value-type="string">
            <text:p>אין נתון לשנה</text:p>
          </table:table-cell>
          <table:table-cell table:number-columns-repeated="2"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81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42161" calcext:value-type="float">
            <text:p>5142161</text:p>
          </table:table-cell>
          <table:table-cell table:style-name="ce15" office:value-type="string" calcext:value-type="string">
            <text:p><text:a xlink:href="https://maya.tase.co.il/he/funds/mutual-funds/5142161" xlink:type="simple">https://maya.tase.co.il/he/funds/mutual-funds/5142161</text:a></text:p>
          </table:table-cell>
          <table:table-cell table:style-name="ce31" table:content-validation-name="val2" office:value-type="string" calcext:value-type="string">
            <text:p>NASDAQ 100 – NTR</text:p>
          </table:table-cell>
          <table:table-cell table:style-name="ce35" table:content-validation-name="val3" table:formula="of:=COM.MICROSOFT.IFS(ISNUMBER(SEARCH(&quot;/etf/&quot;; [.C82])); &quot;קרן סל&quot;; ISNUMBER(SEARCH(&quot;/mutual-funds/&quot;; [.C82])); &quot;קרן&quot;; ISNUMBER(SEARCH(&quot;/market_data/security/&quot;; [.C82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table:formula="of:=SUM([.F82]-[.N82])" office:value-type="percentage" office:value="-0.3764" calcext:value-type="percentage">
            <text:p>-37.64%</text:p>
          </table:table-cell>
          <table:table-cell table:style-name="ce52" table:formula="of:=SUM([.K82]+[.L82]+[.M82])" office:value-type="percentage" office:value="0.0002" calcext:value-type="percentage">
            <text:p>0.02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 office:value-type="string" calcext:value-type="string">
            <text:p>אין נתון לשנה</text:p>
          </table:table-cell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82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221662" calcext:value-type="float">
            <text:p>1221662</text:p>
          </table:table-cell>
          <table:table-cell table:style-name="ce13" office:value-type="string" calcext:value-type="string">
            <text:p><text:a xlink:href="https://market.tase.co.il/he/market_data/etf/1221662/major_data" xlink:type="simple">https://market.tase.co.il/he/market_data/etf/1221662/major_data</text:a></text:p>
          </table:table-cell>
          <table:table-cell table:style-name="ce30" table:content-validation-name="val2" office:value-type="string" calcext:value-type="string">
            <text:p>NASDAQ 100 – NTR</text:p>
          </table:table-cell>
          <table:table-cell table:style-name="ce34" table:content-validation-name="val3" table:formula="of:=COM.MICROSOFT.IFS(ISNUMBER(SEARCH(&quot;/etf/&quot;; [.C83])); &quot;קרן סל&quot;; ISNUMBER(SEARCH(&quot;/mutual-funds/&quot;; [.C83])); &quot;קרן&quot;; ISNUMBER(SEARCH(&quot;/market_data/security/&quot;; [.C83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8" table:formula="of:=SUM([.F83]-[.N83])" office:value-type="percentage" office:value="-0.3764" calcext:value-type="percentage">
            <text:p>-37.64%</text:p>
          </table:table-cell>
          <table:table-cell table:style-name="ce51" table:formula="of:=SUM([.K83]+[.L83]+[.M83])" office:value-type="percentage" office:value="0.0148" calcext:value-type="percentage">
            <text:p>1.48%</text:p>
          </table:table-cell>
          <table:table-cell table:style-name="ce55" table:content-validation-name="val4" office:value-type="string" calcext:value-type="string">
            <text:p>6D + דולר</text:p>
          </table:table-cell>
          <table:table-cell table:style-name="ce61" office:value-type="string" calcext:value-type="string">
            <text:p>חשיפה 300% (חולק ב 3), אין נתון לשנה</text:p>
          </table:table-cell>
          <table:table-cell table:style-name="ce51" office:value-type="percentage" office:value="0.0145" calcext:value-type="percentage">
            <text:p>1.4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83]; [Indices.$A$2:.$A$100]; 0))" office:value-type="percentage" office:value="0.3764" calcext:value-type="percentage">
            <text:p>37.64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9251" calcext:value-type="float">
            <text:p>1149251</text:p>
          </table:table-cell>
          <table:table-cell table:style-name="ce13" office:value-type="string" calcext:value-type="string">
            <text:p><text:a xlink:href="https://market.tase.co.il/he/market_data/etf/1149251/major_data" xlink:type="simple">https://market.tase.co.il/he/market_data/etf/1149251/major_data</text:a></text:p>
          </table:table-cell>
          <table:table-cell table:style-name="ce30" table:content-validation-name="val2" office:value-type="string" calcext:value-type="string">
            <text:p>NIKKEI 225 – NTR</text:p>
          </table:table-cell>
          <table:table-cell table:style-name="ce34" table:content-validation-name="val3" table:formula="of:=COM.MICROSOFT.IFS(ISNUMBER(SEARCH(&quot;/etf/&quot;; [.C84])); &quot;קרן סל&quot;; ISNUMBER(SEARCH(&quot;/mutual-funds/&quot;; [.C84])); &quot;קרן&quot;; ISNUMBER(SEARCH(&quot;/market_data/security/&quot;; [.C84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7519" calcext:value-type="percentage">
            <text:p>75.19%</text:p>
          </table:table-cell>
          <table:table-cell table:style-name="ce38" table:formula="of:=SUM([.F84]-[.N84])" office:value-type="percentage" office:value="-0.00209999999999999" calcext:value-type="percentage">
            <text:p>-0.21%</text:p>
          </table:table-cell>
          <table:table-cell table:style-name="ce51" table:formula="of:=SUM([.K84]+[.L84]+[.M84])" office:value-type="percentage" office:value="0.008" calcext:value-type="percentage">
            <text:p>0.8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78" calcext:value-type="percentage">
            <text:p>0.78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84]; [Indices.$A$2:.$A$100]; 0))" office:value-type="percentage" office:value="0.754" calcext:value-type="percentage">
            <text:p>75.40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50531" calcext:value-type="float">
            <text:p>1150531</text:p>
          </table:table-cell>
          <table:table-cell table:style-name="ce15" office:value-type="string" calcext:value-type="string">
            <text:p><text:a xlink:href="https://market.tase.co.il/he/market_data/etf/1150531/major_data" xlink:type="simple">https://market.tase.co.il/he/market_data/etf/1150531/major_data</text:a></text:p>
          </table:table-cell>
          <table:table-cell table:style-name="ce31" table:content-validation-name="val2" office:value-type="string" calcext:value-type="string">
            <text:p>NIKKEI 225 – NTR</text:p>
          </table:table-cell>
          <table:table-cell table:style-name="ce35" table:content-validation-name="val3" table:formula="of:=COM.MICROSOFT.IFS(ISNUMBER(SEARCH(&quot;/etf/&quot;; [.C85])); &quot;קרן סל&quot;; ISNUMBER(SEARCH(&quot;/mutual-funds/&quot;; [.C85])); &quot;קרן&quot;; ISNUMBER(SEARCH(&quot;/market_data/security/&quot;; [.C85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7404" calcext:value-type="percentage">
            <text:p>74.04%</text:p>
          </table:table-cell>
          <table:table-cell table:style-name="ce39" table:formula="of:=SUM([.F85]-[.N85])" office:value-type="percentage" office:value="-0.0136000000000001" calcext:value-type="percentage">
            <text:p>-1.36%</text:p>
          </table:table-cell>
          <table:table-cell table:style-name="ce52" table:formula="of:=SUM([.K85]+[.L85]+[.M85])" office:value-type="percentage" office:value="0.008" calcext:value-type="percentage">
            <text:p>0.8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77" calcext:value-type="percentage">
            <text:p>0.77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85]; [Indices.$A$2:.$A$100]; 0))" office:value-type="percentage" office:value="0.754" calcext:value-type="percentage">
            <text:p>75.40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4468" calcext:value-type="float">
            <text:p>1144468</text:p>
          </table:table-cell>
          <table:table-cell table:style-name="ce13" office:value-type="string" calcext:value-type="string">
            <text:p><text:a xlink:href="https://market.tase.co.il/he/market_data/etf/1144468/major_data" xlink:type="simple">https://market.tase.co.il/he/market_data/etf/1144468/major_data</text:a></text:p>
          </table:table-cell>
          <table:table-cell table:style-name="ce30" table:content-validation-name="val2" office:value-type="string" calcext:value-type="string">
            <text:p>NIKKEI 225 – NTR</text:p>
          </table:table-cell>
          <table:table-cell table:style-name="ce34" table:content-validation-name="val3" table:formula="of:=COM.MICROSOFT.IFS(ISNUMBER(SEARCH(&quot;/etf/&quot;; [.C86])); &quot;קרן סל&quot;; ISNUMBER(SEARCH(&quot;/mutual-funds/&quot;; [.C86])); &quot;קרן&quot;; ISNUMBER(SEARCH(&quot;/market_data/security/&quot;; [.C86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7331" calcext:value-type="percentage">
            <text:p>73.31%</text:p>
          </table:table-cell>
          <table:table-cell table:style-name="ce38" table:formula="of:=SUM([.F86]-[.N86])" office:value-type="percentage" office:value="-0.0209" calcext:value-type="percentage">
            <text:p>-2.09%</text:p>
          </table:table-cell>
          <table:table-cell table:style-name="ce51" table:formula="of:=SUM([.K86]+[.L86]+[.M86])" office:value-type="percentage" office:value="0.0098" calcext:value-type="percentage">
            <text:p>0.98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95" calcext:value-type="percentage">
            <text:p>0.9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86]; [Indices.$A$2:.$A$100]; 0))" office:value-type="percentage" office:value="0.754" calcext:value-type="percentage">
            <text:p>75.40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5945" calcext:value-type="float">
            <text:p>1145945</text:p>
          </table:table-cell>
          <table:table-cell table:style-name="ce15" office:value-type="string" calcext:value-type="string">
            <text:p><text:a xlink:href="https://market.tase.co.il/he/market_data/etf/1145945/major_data" xlink:type="simple">https://market.tase.co.il/he/market_data/etf/1145945/major_data</text:a></text:p>
          </table:table-cell>
          <table:table-cell table:style-name="ce31" table:content-validation-name="val2" office:value-type="string" calcext:value-type="string">
            <text:p>NIKKEI 225 – NTR</text:p>
          </table:table-cell>
          <table:table-cell table:style-name="ce35" table:content-validation-name="val3" table:formula="of:=COM.MICROSOFT.IFS(ISNUMBER(SEARCH(&quot;/etf/&quot;; [.C87])); &quot;קרן סל&quot;; ISNUMBER(SEARCH(&quot;/mutual-funds/&quot;; [.C87])); &quot;קרן&quot;; ISNUMBER(SEARCH(&quot;/market_data/security/&quot;; [.C87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7263" calcext:value-type="percentage">
            <text:p>72.63%</text:p>
          </table:table-cell>
          <table:table-cell table:style-name="ce39" table:formula="of:=SUM([.F87]-[.N87])" office:value-type="percentage" office:value="-0.0277000000000001" calcext:value-type="percentage">
            <text:p>-2.77%</text:p>
          </table:table-cell>
          <table:table-cell table:style-name="ce52" table:formula="of:=SUM([.K87]+[.L87]+[.M87])" office:value-type="percentage" office:value="0.0126" calcext:value-type="percentage">
            <text:p>1.26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123" calcext:value-type="percentage">
            <text:p>1.23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87]; [Indices.$A$2:.$A$100]; 0))" office:value-type="percentage" office:value="0.754" calcext:value-type="percentage">
            <text:p>75.40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6064" calcext:value-type="float">
            <text:p>5136064</text:p>
          </table:table-cell>
          <table:table-cell table:style-name="ce15" office:value-type="string" calcext:value-type="string">
            <text:p><text:a xlink:href="https://maya.tase.co.il/he/funds/mutual-funds/5136064" xlink:type="simple">https://maya.tase.co.il/he/funds/mutual-funds/5136064</text:a></text:p>
          </table:table-cell>
          <table:table-cell table:style-name="ce31" table:content-validation-name="val2" office:value-type="string" calcext:value-type="string">
            <text:p>NIKKEI 225 – NTR</text:p>
          </table:table-cell>
          <table:table-cell table:style-name="ce35" table:content-validation-name="val3" table:formula="of:=COM.MICROSOFT.IFS(ISNUMBER(SEARCH(&quot;/etf/&quot;; [.C88])); &quot;קרן סל&quot;; ISNUMBER(SEARCH(&quot;/mutual-funds/&quot;; [.C88])); &quot;קרן&quot;; ISNUMBER(SEARCH(&quot;/market_data/security/&quot;; [.C88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298" calcext:value-type="percentage">
            <text:p>29.80%</text:p>
          </table:table-cell>
          <table:table-cell table:style-name="ce39" table:formula="of:=SUM([.F88]-[.N88])" office:value-type="percentage" office:value="-0.456" calcext:value-type="percentage">
            <text:p>-45.60%</text:p>
          </table:table-cell>
          <table:table-cell table:style-name="ce52" table:formula="of:=SUM([.K88]+[.L88]+[.M88])" office:value-type="percentage" office:value="0.0088" calcext:value-type="percentage">
            <text:p>0.88%</text:p>
          </table:table-cell>
          <table:table-cell table:style-name="ce56" table:content-validation-name="val4" office:value-type="string" calcext:value-type="string">
            <text:p>4D + יין יפני</text:p>
          </table:table-cell>
          <table:table-cell table:style-name="ce62"/>
          <table:table-cell table:style-name="ce52" office:value-type="percentage" office:value="0.0055" calcext:value-type="percentage">
            <text:p>0.55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88]; [Indices.$A$2:.$A$100]; 0))" office:value-type="percentage" office:value="0.754" calcext:value-type="percentage">
            <text:p>75.40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4419" calcext:value-type="float">
            <text:p>1144419</text:p>
          </table:table-cell>
          <table:table-cell table:style-name="ce13" office:value-type="string" calcext:value-type="string">
            <text:p><text:a xlink:href="https://market.tase.co.il/he/market_data/etf/1144419/major_data" xlink:type="simple">https://market.tase.co.il/he/market_data/etf/1144419/major_data</text:a></text:p>
          </table:table-cell>
          <table:table-cell table:style-name="ce30" table:content-validation-name="val2" office:value-type="string" calcext:value-type="string">
            <text:p>NIKKEI 225 – NTR</text:p>
          </table:table-cell>
          <table:table-cell table:style-name="ce34" table:content-validation-name="val3" table:formula="of:=COM.MICROSOFT.IFS(ISNUMBER(SEARCH(&quot;/etf/&quot;; [.C89])); &quot;קרן סל&quot;; ISNUMBER(SEARCH(&quot;/mutual-funds/&quot;; [.C89])); &quot;קרן&quot;; ISNUMBER(SEARCH(&quot;/market_data/security/&quot;; [.C89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2676" calcext:value-type="percentage">
            <text:p>26.76%</text:p>
          </table:table-cell>
          <table:table-cell table:style-name="ce38" table:formula="of:=SUM([.F89]-[.N89])" office:value-type="percentage" office:value="-0.4864" calcext:value-type="percentage">
            <text:p>-48.64%</text:p>
          </table:table-cell>
          <table:table-cell table:style-name="ce51" table:formula="of:=SUM([.K89]+[.L89]+[.M89])" office:value-type="percentage" office:value="0.0088" calcext:value-type="percentage">
            <text:p>0.88%</text:p>
          </table:table-cell>
          <table:table-cell table:style-name="ce55" table:content-validation-name="val4" office:value-type="string" calcext:value-type="string">
            <text:p>4D + יין יפני</text:p>
          </table:table-cell>
          <table:table-cell table:style-name="ce61"/>
          <table:table-cell table:style-name="ce51" office:value-type="percentage" office:value="0.007" calcext:value-type="percentage">
            <text:p>0.7%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89]; [Indices.$A$2:.$A$100]; 0))" office:value-type="percentage" office:value="0.754" calcext:value-type="percentage">
            <text:p>75.40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83441" calcext:value-type="float">
            <text:p>1183441</text:p>
          </table:table-cell>
          <table:table-cell table:style-name="ce15" office:value-type="string" calcext:value-type="string">
            <text:p><text:a xlink:href="https://market.tase.co.il/he/market_data/security/1183441/major_data" xlink:type="simple">https://market.tase.co.il/he/market_data/security/1183441/major_data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90])); &quot;קרן סל&quot;; ISNUMBER(SEARCH(&quot;/mutual-funds/&quot;; [.C90])); &quot;קרן&quot;; ISNUMBER(SEARCH(&quot;/market_data/security/&quot;; [.C90])); &quot;קרן חוץ&quot;; 1; &quot;&quot;)" office:value-type="string" office:string-value="קרן חוץ" calcext:value-type="string">
            <text:p>קרן חוץ</text:p>
          </table:table-cell>
          <table:table-cell table:style-name="ce39" office:value-type="percentage" office:value="0.2498" calcext:value-type="percentage">
            <text:p>24.98%</text:p>
          </table:table-cell>
          <table:table-cell table:style-name="ce39" table:formula="of:=SUM([.F90]-[.N90])" office:value-type="percentage" office:value="0.00999999999999998" calcext:value-type="percentage">
            <text:p>1.00%</text:p>
          </table:table-cell>
          <table:table-cell table:style-name="ce52" table:formula="of:=SUM([.K90]+[.L90]+[.M90])" office:value-type="percentage" office:value="0.0005" calcext:value-type="percentage">
            <text:p>0.05%</text:p>
          </table:table-cell>
          <table:table-cell table:style-name="ce56" table:content-validation-name="val4" office:value-type="string" calcext:value-type="string">
            <text:p>דולר</text:p>
          </table:table-cell>
          <table:table-cell table:style-name="ce62"/>
          <table:table-cell table:style-name="ce52" office:value-type="percentage" office:value="0.0005" calcext:value-type="percentage">
            <text:p>0.05%</text:p>
          </table:table-cell>
          <table:table-cell table:number-columns-repeated="2" table:style-name="ce52" office:value-type="percentage" office:value="0" calcext:value-type="percentage">
            <text:p>0%</text:p>
          </table:table-cell>
          <table:table-cell table:style-name="ce66" table:formula="of:=INDEX([Indices.$B$2:.$B$100]; MATCH([.D90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59250" calcext:value-type="float">
            <text:p>1159250</text:p>
          </table:table-cell>
          <table:table-cell table:style-name="ce13" office:value-type="string" calcext:value-type="string">
            <text:p><text:a xlink:href="https://market.tase.co.il/he/market_data/security/1159250/major_data" xlink:type="simple">https://market.tase.co.il/he/market_data/security/1159250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91])); &quot;קרן סל&quot;; ISNUMBER(SEARCH(&quot;/mutual-funds/&quot;; [.C91])); &quot;קרן&quot;; ISNUMBER(SEARCH(&quot;/market_data/security/&quot;; [.C91])); &quot;קרן חוץ&quot;; 1; &quot;&quot;)" office:value-type="string" office:string-value="קרן חוץ" calcext:value-type="string">
            <text:p>קרן חוץ</text:p>
          </table:table-cell>
          <table:table-cell table:style-name="ce38" office:value-type="percentage" office:value="0.2464" calcext:value-type="percentage">
            <text:p>24.64%</text:p>
          </table:table-cell>
          <table:table-cell table:style-name="ce38" table:formula="of:=SUM([.F91]-[.N91])" office:value-type="percentage" office:value="0.0066" calcext:value-type="percentage">
            <text:p>0.66%</text:p>
          </table:table-cell>
          <table:table-cell table:style-name="ce51" table:formula="of:=SUM([.K91]+[.L91]+[.M91])" office:value-type="percentage" office:value="0.0007" calcext:value-type="percentage">
            <text:p>0.07%</text:p>
          </table:table-cell>
          <table:table-cell table:style-name="ce55" table:content-validation-name="val4" office:value-type="string" calcext:value-type="string">
            <text:p>דולר</text:p>
          </table:table-cell>
          <table:table-cell table:style-name="ce61" office:value-type="string" calcext:value-type="string">
            <text:p>מיסוי נוסף - אירלנד 15%</text:p>
          </table:table-cell>
          <table:table-cell table:style-name="ce51" office:value-type="percentage" office:value="0.0007" calcext:value-type="percentage">
            <text:p>0.07%</text:p>
          </table:table-cell>
          <table:table-cell table:number-columns-repeated="2" table:style-name="ce51" office:value-type="percentage" office:value="0" calcext:value-type="percentage">
            <text:p>0%</text:p>
          </table:table-cell>
          <table:table-cell table:style-name="ce65" table:formula="of:=INDEX([Indices.$B$2:.$B$100]; MATCH([.D91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40546" calcext:value-type="float">
            <text:p>5140546</text:p>
          </table:table-cell>
          <table:table-cell table:style-name="ce13" office:value-type="string" calcext:value-type="string">
            <text:p><text:a xlink:href="https://maya.tase.co.il/he/funds/mutual-funds/5140546" xlink:type="simple">https://maya.tase.co.il/he/funds/mutual-funds/5140546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92])); &quot;קרן סל&quot;; ISNUMBER(SEARCH(&quot;/mutual-funds/&quot;; [.C92])); &quot;קרן&quot;; ISNUMBER(SEARCH(&quot;/market_data/security/&quot;; [.C92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2302" calcext:value-type="percentage">
            <text:p>23.02%</text:p>
          </table:table-cell>
          <table:table-cell table:style-name="ce38" table:formula="of:=SUM([.F92]-[.N92])" office:value-type="percentage" office:value="-0.00960000000000003" calcext:value-type="percentage">
            <text:p>-0.96%</text:p>
          </table:table-cell>
          <table:table-cell table:style-name="ce51" table:formula="of:=SUM([.K92]+[.L92]+[.M92])" office:value-type="percentage" office:value="0.0003" calcext:value-type="percentage">
            <text:p>0.03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number-columns-repeated="2" table:style-name="ce51" office:value-type="percentage" office:value="0" calcext:value-type="percentage">
            <text:p>0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92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9290" calcext:value-type="float">
            <text:p>5139290</text:p>
          </table:table-cell>
          <table:table-cell table:style-name="ce15" office:value-type="string" calcext:value-type="string">
            <text:p><text:a xlink:href="https://maya.tase.co.il/he/funds/mutual-funds/5139290" xlink:type="simple">https://maya.tase.co.il/he/funds/mutual-funds/5139290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93])); &quot;קרן סל&quot;; ISNUMBER(SEARCH(&quot;/mutual-funds/&quot;; [.C93])); &quot;קרן&quot;; ISNUMBER(SEARCH(&quot;/market_data/security/&quot;; [.C93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2288" calcext:value-type="percentage">
            <text:p>22.88%</text:p>
          </table:table-cell>
          <table:table-cell table:style-name="ce39" table:formula="of:=SUM([.F93]-[.N93])" office:value-type="percentage" office:value="-0.011" calcext:value-type="percentage">
            <text:p>-1.10%</text:p>
          </table:table-cell>
          <table:table-cell table:style-name="ce52" table:formula="of:=SUM([.K93]+[.L93]+[.M93])" office:value-type="percentage" office:value="0.0002" calcext:value-type="percentage">
            <text:p>0.02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93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2957" calcext:value-type="float">
            <text:p>5122957</text:p>
          </table:table-cell>
          <table:table-cell table:style-name="ce13" office:value-type="string" calcext:value-type="string">
            <text:p><text:a xlink:href="https://maya.tase.co.il/he/funds/mutual-funds/5122957" xlink:type="simple">https://maya.tase.co.il/he/funds/mutual-funds/5122957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94])); &quot;קרן סל&quot;; ISNUMBER(SEARCH(&quot;/mutual-funds/&quot;; [.C94])); &quot;קרן&quot;; ISNUMBER(SEARCH(&quot;/market_data/security/&quot;; [.C94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2278" calcext:value-type="percentage">
            <text:p>22.78%</text:p>
          </table:table-cell>
          <table:table-cell table:style-name="ce38" table:formula="of:=SUM([.F94]-[.N94])" office:value-type="percentage" office:value="-0.012" calcext:value-type="percentage">
            <text:p>-1.20%</text:p>
          </table:table-cell>
          <table:table-cell table:style-name="ce51" table:formula="of:=SUM([.K94]+[.L94]+[.M94])" office:value-type="percentage" office:value="0.00225" calcext:value-type="percentage">
            <text:p>0.225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2" calcext:value-type="percentage">
            <text:p>0.2%</text:p>
          </table:table-cell>
          <table:table-cell table:style-name="ce51" office:value-type="percentage" office:value="0.00025" calcext:value-type="percentage">
            <text:p>0.025%</text:p>
          </table:table-cell>
          <table:table-cell table:style-name="ce65" table:formula="of:=INDEX([Indices.$B$2:.$B$100]; MATCH([.D94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23161" calcext:value-type="float">
            <text:p>5123161</text:p>
          </table:table-cell>
          <table:table-cell table:style-name="ce15" office:value-type="string" calcext:value-type="string">
            <text:p><text:a xlink:href="https://maya.tase.co.il/he/funds/mutual-funds/5123161" xlink:type="simple">https://maya.tase.co.il/he/funds/mutual-funds/5123161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95])); &quot;קרן סל&quot;; ISNUMBER(SEARCH(&quot;/mutual-funds/&quot;; [.C95])); &quot;קרן&quot;; ISNUMBER(SEARCH(&quot;/market_data/security/&quot;; [.C95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2255" calcext:value-type="percentage">
            <text:p>22.55%</text:p>
          </table:table-cell>
          <table:table-cell table:style-name="ce39" table:formula="of:=SUM([.F95]-[.N95])" office:value-type="percentage" office:value="-0.0143" calcext:value-type="percentage">
            <text:p>-1.43%</text:p>
          </table:table-cell>
          <table:table-cell table:style-name="ce52" table:formula="of:=SUM([.K95]+[.L95]+[.M95])" office:value-type="percentage" office:value="0.0033" calcext:value-type="percentage">
            <text:p>0.33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95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7527" calcext:value-type="float">
            <text:p>5127527</text:p>
          </table:table-cell>
          <table:table-cell table:style-name="ce13" office:value-type="string" calcext:value-type="string">
            <text:p><text:a xlink:href="https://maya.tase.co.il/he/funds/mutual-funds/5127527" xlink:type="simple">https://maya.tase.co.il/he/funds/mutual-funds/5127527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96])); &quot;קרן סל&quot;; ISNUMBER(SEARCH(&quot;/mutual-funds/&quot;; [.C96])); &quot;קרן&quot;; ISNUMBER(SEARCH(&quot;/market_data/security/&quot;; [.C96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2247" calcext:value-type="percentage">
            <text:p>22.47%</text:p>
          </table:table-cell>
          <table:table-cell table:style-name="ce38" table:formula="of:=SUM([.F96]-[.N96])" office:value-type="percentage" office:value="-0.0151" calcext:value-type="percentage">
            <text:p>-1.51%</text:p>
          </table:table-cell>
          <table:table-cell table:style-name="ce51" table:formula="of:=SUM([.K96]+[.L96]+[.M96])" office:value-type="percentage" office:value="0.0032" calcext:value-type="percentage">
            <text:p>0.32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96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25869" calcext:value-type="float">
            <text:p>5125869</text:p>
          </table:table-cell>
          <table:table-cell table:style-name="ce15" office:value-type="string" calcext:value-type="string">
            <text:p><text:a xlink:href="https://maya.tase.co.il/he/funds/mutual-funds/5125869" xlink:type="simple">https://maya.tase.co.il/he/funds/mutual-funds/5125869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97])); &quot;קרן סל&quot;; ISNUMBER(SEARCH(&quot;/mutual-funds/&quot;; [.C97])); &quot;קרן&quot;; ISNUMBER(SEARCH(&quot;/market_data/security/&quot;; [.C97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2243" calcext:value-type="percentage">
            <text:p>22.43%</text:p>
          </table:table-cell>
          <table:table-cell table:style-name="ce39" table:formula="of:=SUM([.F97]-[.N97])" office:value-type="percentage" office:value="-0.0155" calcext:value-type="percentage">
            <text:p>-1.55%</text:p>
          </table:table-cell>
          <table:table-cell table:style-name="ce52" table:formula="of:=SUM([.K97]+[.L97]+[.M97])" office:value-type="percentage" office:value="0.0032" calcext:value-type="percentage">
            <text:p>0.32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97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3021" calcext:value-type="float">
            <text:p>5123021</text:p>
          </table:table-cell>
          <table:table-cell table:style-name="ce13" office:value-type="string" calcext:value-type="string">
            <text:p><text:a xlink:href="https://maya.tase.co.il/he/funds/mutual-funds/5123021" xlink:type="simple">https://maya.tase.co.il/he/funds/mutual-funds/5123021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98])); &quot;קרן סל&quot;; ISNUMBER(SEARCH(&quot;/mutual-funds/&quot;; [.C98])); &quot;קרן&quot;; ISNUMBER(SEARCH(&quot;/market_data/security/&quot;; [.C98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224" calcext:value-type="percentage">
            <text:p>22.40%</text:p>
          </table:table-cell>
          <table:table-cell table:style-name="ce38" table:formula="of:=SUM([.F98]-[.N98])" office:value-type="percentage" office:value="-0.0158" calcext:value-type="percentage">
            <text:p>-1.58%</text:p>
          </table:table-cell>
          <table:table-cell table:style-name="ce51" table:formula="of:=SUM([.K98]+[.L98]+[.M98])" office:value-type="percentage" office:value="0.0032" calcext:value-type="percentage">
            <text:p>0.32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98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31628" calcext:value-type="float">
            <text:p>5131628</text:p>
          </table:table-cell>
          <table:table-cell table:style-name="ce13" office:value-type="string" calcext:value-type="string">
            <text:p><text:a xlink:href="https://maya.tase.co.il/he/funds/mutual-funds/5131628" xlink:type="simple">https://maya.tase.co.il/he/funds/mutual-funds/5131628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99])); &quot;קרן סל&quot;; ISNUMBER(SEARCH(&quot;/mutual-funds/&quot;; [.C99])); &quot;קרן&quot;; ISNUMBER(SEARCH(&quot;/market_data/security/&quot;; [.C99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2228" calcext:value-type="percentage">
            <text:p>22.28%</text:p>
          </table:table-cell>
          <table:table-cell table:style-name="ce38" table:formula="of:=SUM([.F99]-[.N99])" office:value-type="percentage" office:value="-0.017" calcext:value-type="percentage">
            <text:p>-1.70%</text:p>
          </table:table-cell>
          <table:table-cell table:style-name="ce51" table:formula="of:=SUM([.K99]+[.L99]+[.M99])" office:value-type="percentage" office:value="0.00565" calcext:value-type="percentage">
            <text:p>0.565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25" calcext:value-type="percentage">
            <text:p>0.25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15" calcext:value-type="percentage">
            <text:p>0.015%</text:p>
          </table:table-cell>
          <table:table-cell table:style-name="ce65" table:formula="of:=INDEX([Indices.$B$2:.$B$100]; MATCH([.D99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200435" calcext:value-type="float">
            <text:p>1200435</text:p>
          </table:table-cell>
          <table:table-cell table:style-name="ce13" office:value-type="string" calcext:value-type="string">
            <text:p><text:a xlink:href="https://market.tase.co.il/he/market_data/etf/1200435/major_data" xlink:type="simple">https://market.tase.co.il/he/market_data/etf/1200435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00])); &quot;קרן סל&quot;; ISNUMBER(SEARCH(&quot;/mutual-funds/&quot;; [.C100])); &quot;קרן&quot;; ISNUMBER(SEARCH(&quot;/market_data/security/&quot;; [.C100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2133" calcext:value-type="percentage">
            <text:p>21.33%</text:p>
          </table:table-cell>
          <table:table-cell table:style-name="ce38" table:formula="of:=SUM([.F100]-[.N100])" office:value-type="percentage" office:value="-0.0265" calcext:value-type="percentage">
            <text:p>-2.65%</text:p>
          </table:table-cell>
          <table:table-cell table:style-name="ce51" table:formula="of:=SUM([.K100]+[.L100]+[.M100])" office:value-type="percentage" office:value="0.0031" calcext:value-type="percentage">
            <text:p>0.31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65" table:formula="of:=INDEX([Indices.$B$2:.$B$100]; MATCH([.D100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201664" calcext:value-type="float">
            <text:p>1201664</text:p>
          </table:table-cell>
          <table:table-cell table:style-name="ce15" office:value-type="string" calcext:value-type="string">
            <text:p><text:a xlink:href="https://market.tase.co.il/he/market_data/etf/1201664/major_data" xlink:type="simple">https://market.tase.co.il/he/market_data/etf/1201664/major_data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01])); &quot;קרן סל&quot;; ISNUMBER(SEARCH(&quot;/mutual-funds/&quot;; [.C101])); &quot;קרן&quot;; ISNUMBER(SEARCH(&quot;/market_data/security/&quot;; [.C101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2123" calcext:value-type="percentage">
            <text:p>21.23%</text:p>
          </table:table-cell>
          <table:table-cell table:style-name="ce39" table:formula="of:=SUM([.F101]-[.N101])" office:value-type="percentage" office:value="-0.0275" calcext:value-type="percentage">
            <text:p>-2.75%</text:p>
          </table:table-cell>
          <table:table-cell table:style-name="ce52" table:formula="of:=SUM([.K101]+[.L101]+[.M101])" office:value-type="percentage" office:value="0.0032" calcext:value-type="percentage">
            <text:p>0.32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101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65828" calcext:value-type="float">
            <text:p>1165828</text:p>
          </table:table-cell>
          <table:table-cell table:style-name="ce13" office:value-type="string" calcext:value-type="string">
            <text:p><text:a xlink:href="https://market.tase.co.il/he/market_data/etf/1165828/major_data" xlink:type="simple">https://market.tase.co.il/he/market_data/etf/1165828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02])); &quot;קרן סל&quot;; ISNUMBER(SEARCH(&quot;/mutual-funds/&quot;; [.C102])); &quot;קרן&quot;; ISNUMBER(SEARCH(&quot;/market_data/security/&quot;; [.C102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2123" calcext:value-type="percentage">
            <text:p>21.23%</text:p>
          </table:table-cell>
          <table:table-cell table:style-name="ce38" table:formula="of:=SUM([.F102]-[.N102])" office:value-type="percentage" office:value="-0.0275" calcext:value-type="percentage">
            <text:p>-2.75%</text:p>
          </table:table-cell>
          <table:table-cell table:style-name="ce51" table:formula="of:=SUM([.K102]+[.L102]+[.M102])" office:value-type="percentage" office:value="0.0042" calcext:value-type="percentage">
            <text:p>0.42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1" calcext:value-type="percentage">
            <text:p>0.1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102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218924" calcext:value-type="float">
            <text:p>1218924</text:p>
          </table:table-cell>
          <table:table-cell table:style-name="ce15" office:value-type="string" calcext:value-type="string">
            <text:p><text:a xlink:href="https://market.tase.co.il/he/market_data/etf/1218924/major_data" xlink:type="simple">https://market.tase.co.il/he/market_data/etf/1218924/major_data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03])); &quot;קרן סל&quot;; ISNUMBER(SEARCH(&quot;/mutual-funds/&quot;; [.C103])); &quot;קרן&quot;; ISNUMBER(SEARCH(&quot;/market_data/security/&quot;; [.C103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2107" calcext:value-type="percentage">
            <text:p>21.07%</text:p>
          </table:table-cell>
          <table:table-cell table:style-name="ce39" table:formula="of:=SUM([.F103]-[.N103])" office:value-type="percentage" office:value="-0.0291" calcext:value-type="percentage">
            <text:p>-2.91%</text:p>
          </table:table-cell>
          <table:table-cell table:style-name="ce52" table:formula="of:=SUM([.K103]+[.L103]+[.M103])" office:value-type="percentage" office:value="0.00208" calcext:value-type="percentage">
            <text:p>0.208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2" calcext:value-type="percentage">
            <text:p>0.2%</text:p>
          </table:table-cell>
          <table:table-cell table:style-name="ce52" office:value-type="percentage" office:value="0.00008" calcext:value-type="percentage">
            <text:p>0.008%</text:p>
          </table:table-cell>
          <table:table-cell table:style-name="ce66" table:formula="of:=INDEX([Indices.$B$2:.$B$100]; MATCH([.D103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9137" calcext:value-type="float">
            <text:p>1149137</text:p>
          </table:table-cell>
          <table:table-cell table:style-name="ce13" office:value-type="string" calcext:value-type="string">
            <text:p><text:a xlink:href="https://market.tase.co.il/he/market_data/etf/1149137/major_data" xlink:type="simple">https://market.tase.co.il/he/market_data/etf/1149137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04])); &quot;קרן סל&quot;; ISNUMBER(SEARCH(&quot;/mutual-funds/&quot;; [.C104])); &quot;קרן&quot;; ISNUMBER(SEARCH(&quot;/market_data/security/&quot;; [.C104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2071" calcext:value-type="percentage">
            <text:p>20.71%</text:p>
          </table:table-cell>
          <table:table-cell table:style-name="ce38" table:formula="of:=SUM([.F104]-[.N104])" office:value-type="percentage" office:value="-0.0327" calcext:value-type="percentage">
            <text:p>-3.27%</text:p>
          </table:table-cell>
          <table:table-cell table:style-name="ce51" table:formula="of:=SUM([.K104]+[.L104]+[.M104])" office:value-type="percentage" office:value="0.0111" calcext:value-type="percentage">
            <text:p>1.11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8" calcext:value-type="percentage">
            <text:p>0.8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65" table:formula="of:=INDEX([Indices.$B$2:.$B$100]; MATCH([.D104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50572" calcext:value-type="float">
            <text:p>1150572</text:p>
          </table:table-cell>
          <table:table-cell table:style-name="ce15" office:value-type="string" calcext:value-type="string">
            <text:p><text:a xlink:href="https://market.tase.co.il/he/market_data/etf/1150572/major_data" xlink:type="simple">https://market.tase.co.il/he/market_data/etf/1150572/major_data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05])); &quot;קרן סל&quot;; ISNUMBER(SEARCH(&quot;/mutual-funds/&quot;; [.C105])); &quot;קרן&quot;; ISNUMBER(SEARCH(&quot;/market_data/security/&quot;; [.C105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2061" calcext:value-type="percentage">
            <text:p>20.61%</text:p>
          </table:table-cell>
          <table:table-cell table:style-name="ce39" table:formula="of:=SUM([.F105]-[.N105])" office:value-type="percentage" office:value="-0.0337" calcext:value-type="percentage">
            <text:p>-3.37%</text:p>
          </table:table-cell>
          <table:table-cell table:style-name="ce52" table:formula="of:=SUM([.K105]+[.L105]+[.M105])" office:value-type="percentage" office:value="0.0058" calcext:value-type="percentage">
            <text:p>0.58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25" calcext:value-type="percentage">
            <text:p>0.25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105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3817" calcext:value-type="float">
            <text:p>1143817</text:p>
          </table:table-cell>
          <table:table-cell table:style-name="ce13" office:value-type="string" calcext:value-type="string">
            <text:p><text:a xlink:href="https://market.tase.co.il/he/market_data/etf/1143817/major_data" xlink:type="simple">https://market.tase.co.il/he/market_data/etf/1143817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06])); &quot;קרן סל&quot;; ISNUMBER(SEARCH(&quot;/mutual-funds/&quot;; [.C106])); &quot;קרן&quot;; ISNUMBER(SEARCH(&quot;/market_data/security/&quot;; [.C106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2033" calcext:value-type="percentage">
            <text:p>20.33%</text:p>
          </table:table-cell>
          <table:table-cell table:style-name="ce38" table:formula="of:=SUM([.F106]-[.N106])" office:value-type="percentage" office:value="-0.0365" calcext:value-type="percentage">
            <text:p>-3.65%</text:p>
          </table:table-cell>
          <table:table-cell table:style-name="ce51" table:formula="of:=SUM([.K106]+[.L106]+[.M106])" office:value-type="percentage" office:value="0.0113" calcext:value-type="percentage">
            <text:p>1.13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8" calcext:value-type="percentage">
            <text:p>0.8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106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6604" calcext:value-type="float">
            <text:p>1146604</text:p>
          </table:table-cell>
          <table:table-cell table:style-name="ce15" office:value-type="string" calcext:value-type="string">
            <text:p><text:a xlink:href="https://market.tase.co.il/he/market_data/etf/1146604/major_data" xlink:type="simple">https://market.tase.co.il/he/market_data/etf/1146604/major_data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07])); &quot;קרן סל&quot;; ISNUMBER(SEARCH(&quot;/mutual-funds/&quot;; [.C107])); &quot;קרן&quot;; ISNUMBER(SEARCH(&quot;/market_data/security/&quot;; [.C107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2003" calcext:value-type="percentage">
            <text:p>20.03%</text:p>
          </table:table-cell>
          <table:table-cell table:style-name="ce39" table:formula="of:=SUM([.F107]-[.N107])" office:value-type="percentage" office:value="-0.0395" calcext:value-type="percentage">
            <text:p>-3.95%</text:p>
          </table:table-cell>
          <table:table-cell table:style-name="ce52" table:formula="of:=SUM([.K107]+[.L107]+[.M107])" office:value-type="percentage" office:value="0.0123" calcext:value-type="percentage">
            <text:p>1.23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9" calcext:value-type="percentage">
            <text:p>0.9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107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6968" calcext:value-type="float">
            <text:p>1146968</text:p>
          </table:table-cell>
          <table:table-cell table:style-name="ce15" office:value-type="string" calcext:value-type="string">
            <text:p><text:a xlink:href="https://market.tase.co.il/he/market_data/etf/1146968/major_data" xlink:type="simple">https://market.tase.co.il/he/market_data/etf/1146968/major_data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08])); &quot;קרן סל&quot;; ISNUMBER(SEARCH(&quot;/mutual-funds/&quot;; [.C108])); &quot;קרן&quot;; ISNUMBER(SEARCH(&quot;/market_data/security/&quot;; [.C108])); &quot;קרן חוץ&quot;; 1; &quot;&quot;)" office:value-type="string" office:string-value="קרן סל" calcext:value-type="string">
            <text:p>קרן סל</text:p>
          </table:table-cell>
          <table:table-cell table:style-name="ce39" table:formula="of:=SUM(28.14% / 3)" office:value-type="percentage" office:value="0.0938" calcext:value-type="percentage">
            <text:p>9.38%</text:p>
          </table:table-cell>
          <table:table-cell table:style-name="ce39" table:formula="of:=SUM([.F108]-[.N108])" office:value-type="percentage" office:value="-0.146" calcext:value-type="percentage">
            <text:p>-14.60%</text:p>
          </table:table-cell>
          <table:table-cell table:style-name="ce52" table:formula="of:=SUM([.K108]+[.L108]+[.M108])" office:value-type="percentage" office:value="0.0278" calcext:value-type="percentage">
            <text:p>2.78%</text:p>
          </table:table-cell>
          <table:table-cell table:style-name="ce56" table:content-validation-name="val4" office:value-type="string" calcext:value-type="string">
            <text:p>6D + דולר</text:p>
          </table:table-cell>
          <table:table-cell table:style-name="ce62" office:value-type="string" calcext:value-type="string">
            <text:p>חשיפה 300% (חולק ב 3)</text:p>
          </table:table-cell>
          <table:table-cell table:style-name="ce52" office:value-type="percentage" office:value="0.0275" calcext:value-type="percentage">
            <text:p>2.75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108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9282" calcext:value-type="float">
            <text:p>5139282</text:p>
          </table:table-cell>
          <table:table-cell table:style-name="ce15" office:value-type="string" calcext:value-type="string">
            <text:p><text:a xlink:href="https://maya.tase.co.il/he/funds/mutual-funds/5139282" xlink:type="simple">https://maya.tase.co.il/he/funds/mutual-funds/5139282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09])); &quot;קרן סל&quot;; ISNUMBER(SEARCH(&quot;/mutual-funds/&quot;; [.C109])); &quot;קרן&quot;; ISNUMBER(SEARCH(&quot;/market_data/security/&quot;; [.C109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0515" calcext:value-type="percentage">
            <text:p>5.15%</text:p>
          </table:table-cell>
          <table:table-cell table:style-name="ce39" table:formula="of:=SUM([.F109]-[.N109])" office:value-type="percentage" office:value="-0.1883" calcext:value-type="percentage">
            <text:p>-18.83%</text:p>
          </table:table-cell>
          <table:table-cell table:style-name="ce52" table:formula="of:=SUM([.K109]+[.L109]+[.M109])" office:value-type="percentage" office:value="0.0002" calcext:value-type="percentage">
            <text:p>0.02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109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4482" calcext:value-type="float">
            <text:p>5124482</text:p>
          </table:table-cell>
          <table:table-cell table:style-name="ce13" office:value-type="string" calcext:value-type="string">
            <text:p><text:a xlink:href="https://maya.tase.co.il/he/funds/mutual-funds/5124482" xlink:type="simple">https://maya.tase.co.il/he/funds/mutual-funds/5124482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10])); &quot;קרן סל&quot;; ISNUMBER(SEARCH(&quot;/mutual-funds/&quot;; [.C110])); &quot;קרן&quot;; ISNUMBER(SEARCH(&quot;/market_data/security/&quot;; [.C110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0505" calcext:value-type="percentage">
            <text:p>5.05%</text:p>
          </table:table-cell>
          <table:table-cell table:style-name="ce38" table:formula="of:=SUM([.F110]-[.N110])" office:value-type="percentage" office:value="-0.1893" calcext:value-type="percentage">
            <text:p>-18.93%</text:p>
          </table:table-cell>
          <table:table-cell table:style-name="ce51" table:formula="of:=SUM([.K110]+[.L110]+[.M110])" office:value-type="percentage" office:value="0.00125" calcext:value-type="percentage">
            <text:p>0.125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1" calcext:value-type="percentage">
            <text:p>0.1%</text:p>
          </table:table-cell>
          <table:table-cell table:style-name="ce51" office:value-type="percentage" office:value="0.00025" calcext:value-type="percentage">
            <text:p>0.025%</text:p>
          </table:table-cell>
          <table:table-cell table:style-name="ce65" table:formula="of:=INDEX([Indices.$B$2:.$B$100]; MATCH([.D110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39100" calcext:value-type="float">
            <text:p>5139100</text:p>
          </table:table-cell>
          <table:table-cell table:style-name="ce15" office:value-type="string" calcext:value-type="string">
            <text:p><text:a xlink:href="https://maya.tase.co.il/he/funds/mutual-funds/5139100" xlink:type="simple">https://maya.tase.co.il/he/funds/mutual-funds/5139100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11])); &quot;קרן סל&quot;; ISNUMBER(SEARCH(&quot;/mutual-funds/&quot;; [.C111])); &quot;קרן&quot;; ISNUMBER(SEARCH(&quot;/market_data/security/&quot;; [.C111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0504" calcext:value-type="percentage">
            <text:p>5.04%</text:p>
          </table:table-cell>
          <table:table-cell table:style-name="ce39" table:formula="of:=SUM([.F111]-[.N111])" office:value-type="percentage" office:value="-0.1894" calcext:value-type="percentage">
            <text:p>-18.94%</text:p>
          </table:table-cell>
          <table:table-cell table:style-name="ce52" table:formula="of:=SUM([.K111]+[.L111]+[.M111])" office:value-type="percentage" office:value="0.0003" calcext:value-type="percentage">
            <text:p>0.03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number-columns-repeated="2" table:style-name="ce52" office:value-type="percentage" office:value="0" calcext:value-type="percentage">
            <text:p>0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111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22627" calcext:value-type="float">
            <text:p>5122627</text:p>
          </table:table-cell>
          <table:table-cell table:style-name="ce13" office:value-type="string" calcext:value-type="string">
            <text:p><text:a xlink:href="https://maya.tase.co.il/he/funds/mutual-funds/5122627" xlink:type="simple">https://maya.tase.co.il/he/funds/mutual-funds/5122627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12])); &quot;קרן סל&quot;; ISNUMBER(SEARCH(&quot;/mutual-funds/&quot;; [.C112])); &quot;קרן&quot;; ISNUMBER(SEARCH(&quot;/market_data/security/&quot;; [.C112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0478" calcext:value-type="percentage">
            <text:p>4.78%</text:p>
          </table:table-cell>
          <table:table-cell table:style-name="ce38" table:formula="of:=SUM([.F112]-[.N112])" office:value-type="percentage" office:value="-0.192" calcext:value-type="percentage">
            <text:p>-19.20%</text:p>
          </table:table-cell>
          <table:table-cell table:style-name="ce51" table:formula="of:=SUM([.K112]+[.L112]+[.M112])" office:value-type="percentage" office:value="0.0033" calcext:value-type="percentage">
            <text:p>0.33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112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5127469" calcext:value-type="float">
            <text:p>5127469</text:p>
          </table:table-cell>
          <table:table-cell table:style-name="ce15" office:value-type="string" calcext:value-type="string">
            <text:p><text:a xlink:href="https://maya.tase.co.il/he/funds/mutual-funds/5127469" xlink:type="simple">https://maya.tase.co.il/he/funds/mutual-funds/5127469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13])); &quot;קרן סל&quot;; ISNUMBER(SEARCH(&quot;/mutual-funds/&quot;; [.C113])); &quot;קרן&quot;; ISNUMBER(SEARCH(&quot;/market_data/security/&quot;; [.C113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0459" calcext:value-type="percentage">
            <text:p>4.59%</text:p>
          </table:table-cell>
          <table:table-cell table:style-name="ce39" table:formula="of:=SUM([.F113]-[.N113])" office:value-type="percentage" office:value="-0.1939" calcext:value-type="percentage">
            <text:p>-19.39%</text:p>
          </table:table-cell>
          <table:table-cell table:style-name="ce52" table:formula="of:=SUM([.K113]+[.L113]+[.M113])" office:value-type="percentage" office:value="0.00575" calcext:value-type="percentage">
            <text:p>0.575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25" calcext:value-type="percentage">
            <text:p>0.25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5" calcext:value-type="percentage">
            <text:p>0.025%</text:p>
          </table:table-cell>
          <table:table-cell table:style-name="ce66" table:formula="of:=INDEX([Indices.$B$2:.$B$100]; MATCH([.D113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13998" calcext:value-type="float">
            <text:p>5113998</text:p>
          </table:table-cell>
          <table:table-cell table:style-name="ce13" office:value-type="string" calcext:value-type="string">
            <text:p><text:a xlink:href="https://maya.tase.co.il/he/funds/mutual-funds/5113998" xlink:type="simple">https://maya.tase.co.il/he/funds/mutual-funds/5113998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14])); &quot;קרן סל&quot;; ISNUMBER(SEARCH(&quot;/mutual-funds/&quot;; [.C114])); &quot;קרן&quot;; ISNUMBER(SEARCH(&quot;/market_data/security/&quot;; [.C114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0456" calcext:value-type="percentage">
            <text:p>4.56%</text:p>
          </table:table-cell>
          <table:table-cell table:style-name="ce38" table:formula="of:=SUM([.F114]-[.N114])" office:value-type="percentage" office:value="-0.1942" calcext:value-type="percentage">
            <text:p>-19.42%</text:p>
          </table:table-cell>
          <table:table-cell table:style-name="ce51" table:formula="of:=SUM([.K114]+[.L114]+[.M114])" office:value-type="percentage" office:value="0.0063" calcext:value-type="percentage">
            <text:p>0.63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number-columns-repeated="2"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114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17601" calcext:value-type="float">
            <text:p>5117601</text:p>
          </table:table-cell>
          <table:table-cell table:style-name="ce13" office:value-type="string" calcext:value-type="string">
            <text:p><text:a xlink:href="https://maya.tase.co.il/he/funds/mutual-funds/5117601" xlink:type="simple">https://maya.tase.co.il/he/funds/mutual-funds/5117601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15])); &quot;קרן סל&quot;; ISNUMBER(SEARCH(&quot;/mutual-funds/&quot;; [.C115])); &quot;קרן&quot;; ISNUMBER(SEARCH(&quot;/market_data/security/&quot;; [.C115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0448" calcext:value-type="percentage">
            <text:p>4.48%</text:p>
          </table:table-cell>
          <table:table-cell table:style-name="ce38" table:formula="of:=SUM([.F115]-[.N115])" office:value-type="percentage" office:value="-0.195" calcext:value-type="percentage">
            <text:p>-19.50%</text:p>
          </table:table-cell>
          <table:table-cell table:style-name="ce51" table:formula="of:=SUM([.K115]+[.L115]+[.M115])" office:value-type="percentage" office:value="0.0042" calcext:value-type="percentage">
            <text:p>0.42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4" calcext:value-type="percentage">
            <text:p>0.4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115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201656" calcext:value-type="float">
            <text:p>1201656</text:p>
          </table:table-cell>
          <table:table-cell table:style-name="ce13" office:value-type="string" calcext:value-type="string">
            <text:p><text:a xlink:href="https://market.tase.co.il/he/market_data/etf/1201656/major_data" xlink:type="simple">https://market.tase.co.il/he/market_data/etf/1201656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16])); &quot;קרן סל&quot;; ISNUMBER(SEARCH(&quot;/mutual-funds/&quot;; [.C116])); &quot;קרן&quot;; ISNUMBER(SEARCH(&quot;/market_data/security/&quot;; [.C116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17" calcext:value-type="percentage">
            <text:p>1.70%</text:p>
          </table:table-cell>
          <table:table-cell table:style-name="ce38" table:formula="of:=SUM([.F116]-[.N116])" office:value-type="percentage" office:value="-0.2228" calcext:value-type="percentage">
            <text:p>-22.28%</text:p>
          </table:table-cell>
          <table:table-cell table:style-name="ce51" table:formula="of:=SUM([.K116]+[.L116]+[.M116])" office:value-type="percentage" office:value="0.0032" calcext:value-type="percentage">
            <text:p>0.32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116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65810" calcext:value-type="float">
            <text:p>1165810</text:p>
          </table:table-cell>
          <table:table-cell table:style-name="ce15" office:value-type="string" calcext:value-type="string">
            <text:p><text:a xlink:href="https://market.tase.co.il/he/market_data/etf/1165810/major_data" xlink:type="simple">https://market.tase.co.il/he/market_data/etf/1165810/major_data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17])); &quot;קרן סל&quot;; ISNUMBER(SEARCH(&quot;/mutual-funds/&quot;; [.C117])); &quot;קרן&quot;; ISNUMBER(SEARCH(&quot;/market_data/security/&quot;; [.C117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015" calcext:value-type="percentage">
            <text:p>1.50%</text:p>
          </table:table-cell>
          <table:table-cell table:style-name="ce39" table:formula="of:=SUM([.F117]-[.N117])" office:value-type="percentage" office:value="-0.2248" calcext:value-type="percentage">
            <text:p>-22.48%</text:p>
          </table:table-cell>
          <table:table-cell table:style-name="ce52" table:formula="of:=SUM([.K117]+[.L117]+[.M117])" office:value-type="percentage" office:value="0.0042" calcext:value-type="percentage">
            <text:p>0.42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1" calcext:value-type="percentage">
            <text:p>0.1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117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9020" calcext:value-type="float">
            <text:p>1149020</text:p>
          </table:table-cell>
          <table:table-cell table:style-name="ce13" office:value-type="string" calcext:value-type="string">
            <text:p><text:a xlink:href="https://market.tase.co.il/he/market_data/etf/1149020/major_data" xlink:type="simple">https://market.tase.co.il/he/market_data/etf/1149020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18])); &quot;קרן סל&quot;; ISNUMBER(SEARCH(&quot;/mutual-funds/&quot;; [.C118])); &quot;קרן&quot;; ISNUMBER(SEARCH(&quot;/market_data/security/&quot;; [.C118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144" calcext:value-type="percentage">
            <text:p>1.44%</text:p>
          </table:table-cell>
          <table:table-cell table:style-name="ce38" table:formula="of:=SUM([.F118]-[.N118])" office:value-type="percentage" office:value="-0.2254" calcext:value-type="percentage">
            <text:p>-22.54%</text:p>
          </table:table-cell>
          <table:table-cell table:style-name="ce51" table:formula="of:=SUM([.K118]+[.L118]+[.M118])" office:value-type="percentage" office:value="0.00908" calcext:value-type="percentage">
            <text:p>0.908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6" calcext:value-type="percentage">
            <text:p>0.6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08" calcext:value-type="percentage">
            <text:p>0.008%</text:p>
          </table:table-cell>
          <table:table-cell table:style-name="ce65" table:formula="of:=INDEX([Indices.$B$2:.$B$100]; MATCH([.D118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44385" calcext:value-type="float">
            <text:p>1144385</text:p>
          </table:table-cell>
          <table:table-cell table:style-name="ce15" office:value-type="string" calcext:value-type="string">
            <text:p><text:a xlink:href="https://market.tase.co.il/he/market_data/etf/1144385/major_data" xlink:type="simple">https://market.tase.co.il/he/market_data/etf/1144385/major_data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19])); &quot;קרן סל&quot;; ISNUMBER(SEARCH(&quot;/mutual-funds/&quot;; [.C119])); &quot;קרן&quot;; ISNUMBER(SEARCH(&quot;/market_data/security/&quot;; [.C119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9" table:formula="of:=SUM([.F119]-[.N119])" office:value-type="percentage" office:value="-0.2255" calcext:value-type="percentage">
            <text:p>-22.55%</text:p>
          </table:table-cell>
          <table:table-cell table:style-name="ce52" table:formula="of:=SUM([.K119]+[.L119]+[.M119])" office:value-type="percentage" office:value="0.0103" calcext:value-type="percentage">
            <text:p>1.03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7" calcext:value-type="percentage">
            <text:p>0.7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119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6471" calcext:value-type="float">
            <text:p>1146471</text:p>
          </table:table-cell>
          <table:table-cell table:style-name="ce13" office:value-type="string" calcext:value-type="string">
            <text:p><text:a xlink:href="https://market.tase.co.il/he/market_data/etf/1146471/major_data" xlink:type="simple">https://market.tase.co.il/he/market_data/etf/1146471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20])); &quot;קרן סל&quot;; ISNUMBER(SEARCH(&quot;/mutual-funds/&quot;; [.C120])); &quot;קרן&quot;; ISNUMBER(SEARCH(&quot;/market_data/security/&quot;; [.C120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8" table:formula="of:=SUM([.F120]-[.N120])" office:value-type="percentage" office:value="-0.2258" calcext:value-type="percentage">
            <text:p>-22.58%</text:p>
          </table:table-cell>
          <table:table-cell table:style-name="ce51" table:formula="of:=SUM([.K120]+[.L120]+[.M120])" office:value-type="percentage" office:value="0.0093" calcext:value-type="percentage">
            <text:p>0.93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6" calcext:value-type="percentage">
            <text:p>0.6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120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7" office:value-type="date" office:date-value="2026-06-13" calcext:value-type="date">
            <text:p>13/06/26</text:p>
          </table:table-cell>
          <table:table-cell table:style-name="ce11" office:value-type="float" office:value="1150333" calcext:value-type="float">
            <text:p>1150333</text:p>
          </table:table-cell>
          <table:table-cell table:style-name="ce15" office:value-type="string" calcext:value-type="string">
            <text:p><text:a xlink:href="https://market.tase.co.il/he/market_data/etf/1150333/major_data" xlink:type="simple">https://market.tase.co.il/he/market_data/etf/1150333/major_data</text:a></text:p>
          </table:table-cell>
          <table:table-cell table:style-name="ce31" table:content-validation-name="val2" office:value-type="string" calcext:value-type="string">
            <text:p>S&amp;P 500 – NTR</text:p>
          </table:table-cell>
          <table:table-cell table:style-name="ce35" table:content-validation-name="val3" table:formula="of:=COM.MICROSOFT.IFS(ISNUMBER(SEARCH(&quot;/etf/&quot;; [.C121])); &quot;קרן סל&quot;; ISNUMBER(SEARCH(&quot;/mutual-funds/&quot;; [.C121])); &quot;קרן&quot;; ISNUMBER(SEARCH(&quot;/market_data/security/&quot;; [.C121])); &quot;קרן חוץ&quot;; 1; &quot;&quot;)" office:value-type="string" office:string-value="קרן סל" calcext:value-type="string">
            <text:p>קרן סל</text:p>
          </table:table-cell>
          <table:table-cell table:style-name="ce39" office:value-type="percentage" office:value="0.0135" calcext:value-type="percentage">
            <text:p>1.35%</text:p>
          </table:table-cell>
          <table:table-cell table:style-name="ce39" table:formula="of:=SUM([.F121]-[.N121])" office:value-type="percentage" office:value="-0.2263" calcext:value-type="percentage">
            <text:p>-22.63%</text:p>
          </table:table-cell>
          <table:table-cell table:style-name="ce52" table:formula="of:=SUM([.K121]+[.L121]+[.M121])" office:value-type="percentage" office:value="0.0058" calcext:value-type="percentage">
            <text:p>0.58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25" calcext:value-type="percentage">
            <text:p>0.25%</text:p>
          </table:table-cell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121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218916" calcext:value-type="float">
            <text:p>1218916</text:p>
          </table:table-cell>
          <table:table-cell table:style-name="ce13" office:value-type="string" calcext:value-type="string">
            <text:p><text:a xlink:href="https://market.tase.co.il/he/market_data/etf/1218916/major_data" xlink:type="simple">https://market.tase.co.il/he/market_data/etf/1218916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22])); &quot;קרן סל&quot;; ISNUMBER(SEARCH(&quot;/mutual-funds/&quot;; [.C122])); &quot;קרן&quot;; ISNUMBER(SEARCH(&quot;/market_data/security/&quot;; [.C122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127" calcext:value-type="percentage">
            <text:p>1.27%</text:p>
          </table:table-cell>
          <table:table-cell table:style-name="ce38" table:formula="of:=SUM([.F122]-[.N122])" office:value-type="percentage" office:value="-0.2271" calcext:value-type="percentage">
            <text:p>-22.71%</text:p>
          </table:table-cell>
          <table:table-cell table:style-name="ce51" table:formula="of:=SUM([.K122]+[.L122]+[.M122])" office:value-type="percentage" office:value="0.00208" calcext:value-type="percentage">
            <text:p>0.208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2" calcext:value-type="percentage">
            <text:p>0.2%</text:p>
          </table:table-cell>
          <table:table-cell table:style-name="ce51" office:value-type="percentage" office:value="0.00008" calcext:value-type="percentage">
            <text:p>0.008%</text:p>
          </table:table-cell>
          <table:table-cell table:style-name="ce65" table:formula="of:=INDEX([Indices.$B$2:.$B$100]; MATCH([.D122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148162" calcext:value-type="float">
            <text:p>1148162</text:p>
          </table:table-cell>
          <table:table-cell table:style-name="ce13" office:value-type="string" calcext:value-type="string">
            <text:p><text:a xlink:href="https://market.tase.co.il/he/market_data/etf/1148162/major_data" xlink:type="simple">https://market.tase.co.il/he/market_data/etf/1148162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23])); &quot;קרן סל&quot;; ISNUMBER(SEARCH(&quot;/mutual-funds/&quot;; [.C123])); &quot;קרן&quot;; ISNUMBER(SEARCH(&quot;/market_data/security/&quot;; [.C123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8" table:formula="of:=SUM([.F123]-[.N123])" office:value-type="percentage" office:value="-0.2327" calcext:value-type="percentage">
            <text:p>-23.27%</text:p>
          </table:table-cell>
          <table:table-cell table:style-name="ce51" table:formula="of:=SUM([.K123]+[.L123]+[.M123])" office:value-type="percentage" office:value="0.011085" calcext:value-type="percentage">
            <text:p>1.1085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/>
          <table:table-cell table:style-name="ce51" office:value-type="percentage" office:value="0.008" calcext:value-type="percentage">
            <text:p>0.8%</text:p>
          </table:table-cell>
          <table:table-cell table:style-name="ce51" office:value-type="percentage" office:value="0.003" calcext:value-type="percentage">
            <text:p>0.3%</text:p>
          </table:table-cell>
          <table:table-cell table:style-name="ce51" office:value-type="percentage" office:value="0.000085" calcext:value-type="percentage">
            <text:p>0.0085%</text:p>
          </table:table-cell>
          <table:table-cell table:style-name="ce65" table:formula="of:=INDEX([Indices.$B$2:.$B$100]; MATCH([.D123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1221654" calcext:value-type="float">
            <text:p>1221654</text:p>
          </table:table-cell>
          <table:table-cell table:style-name="ce13" office:value-type="string" calcext:value-type="string">
            <text:p><text:a xlink:href="https://market.tase.co.il/he/market_data/etf/1221654/major_data" xlink:type="simple">https://market.tase.co.il/he/market_data/etf/1221654/major_data</text:a></text:p>
          </table:table-cell>
          <table:table-cell table:style-name="ce30" table:content-validation-name="val2" office:value-type="string" calcext:value-type="string">
            <text:p>S&amp;P 500 – NTR</text:p>
          </table:table-cell>
          <table:table-cell table:style-name="ce34" table:content-validation-name="val3" table:formula="of:=COM.MICROSOFT.IFS(ISNUMBER(SEARCH(&quot;/etf/&quot;; [.C124])); &quot;קרן סל&quot;; ISNUMBER(SEARCH(&quot;/mutual-funds/&quot;; [.C124])); &quot;קרן&quot;; ISNUMBER(SEARCH(&quot;/market_data/security/&quot;; [.C124])); &quot;קרן חוץ&quot;; 1; &quot;&quot;)" office:value-type="string" office:string-value="קרן סל" calcext:value-type="string">
            <text:p>קרן סל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8" table:formula="of:=SUM([.F124]-[.N124])" office:value-type="percentage" office:value="-0.2398" calcext:value-type="percentage">
            <text:p>-23.98%</text:p>
          </table:table-cell>
          <table:table-cell table:style-name="ce51" table:formula="of:=SUM([.K124]+[.L124]+[.M124])" office:value-type="percentage" office:value="0.0198" calcext:value-type="percentage">
            <text:p>1.98%</text:p>
          </table:table-cell>
          <table:table-cell table:style-name="ce55" table:content-validation-name="val4" office:value-type="string" calcext:value-type="string">
            <text:p>6D + דולר</text:p>
          </table:table-cell>
          <table:table-cell table:style-name="ce61" office:value-type="string" calcext:value-type="string">
            <text:p>חשיפה 300% (חולק ב 3), אין נתון לשנה</text:p>
          </table:table-cell>
          <table:table-cell table:style-name="ce51" office:value-type="percentage" office:value="0.0195" calcext:value-type="percentage">
            <text:p>1.9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65" table:formula="of:=INDEX([Indices.$B$2:.$B$100]; MATCH([.D124]; [Indices.$A$2:.$A$100]; 0))" office:value-type="percentage" office:value="0.2398" calcext:value-type="percentage">
            <text:p>23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1" office:value-type="float" office:value="5138805" calcext:value-type="float">
            <text:p>5138805</text:p>
          </table:table-cell>
          <table:table-cell table:style-name="ce15" office:value-type="string" calcext:value-type="string">
            <text:p><text:a xlink:href="https://maya.tase.co.il/he/funds/mutual-funds/5138805" xlink:type="simple">https://maya.tase.co.il/he/funds/mutual-funds/5138805</text:a></text:p>
          </table:table-cell>
          <table:table-cell table:style-name="ce31" table:content-validation-name="val2" office:value-type="string" calcext:value-type="string">
            <text:p>S&amp;P 500 Growth</text:p>
          </table:table-cell>
          <table:table-cell table:style-name="ce35" table:content-validation-name="val3" table:formula="of:=COM.MICROSOFT.IFS(ISNUMBER(SEARCH(&quot;/etf/&quot;; [.C125])); &quot;קרן סל&quot;; ISNUMBER(SEARCH(&quot;/mutual-funds/&quot;; [.C125])); &quot;קרן&quot;; ISNUMBER(SEARCH(&quot;/market_data/security/&quot;; [.C125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0716" calcext:value-type="percentage">
            <text:p>7.16%</text:p>
          </table:table-cell>
          <table:table-cell table:style-name="ce39" table:formula="of:=SUM([.F125]-[.N125])" office:value-type="percentage" office:value="-0.2082" calcext:value-type="percentage">
            <text:p>-20.82%</text:p>
          </table:table-cell>
          <table:table-cell table:style-name="ce52" table:formula="of:=SUM([.K125]+[.L125]+[.M125])" office:value-type="percentage" office:value="0.0033" calcext:value-type="percentage">
            <text:p>0.33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3" calcext:value-type="percentage">
            <text:p>0.3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3" calcext:value-type="percentage">
            <text:p>0.03%</text:p>
          </table:table-cell>
          <table:table-cell table:style-name="ce66" table:formula="of:=INDEX([Indices.$B$2:.$B$100]; MATCH([.D125]; [Indices.$A$2:.$A$100]; 0))" office:value-type="percentage" office:value="0.2798" calcext:value-type="percentage">
            <text:p>27.9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40272" calcext:value-type="float">
            <text:p>5140272</text:p>
          </table:table-cell>
          <table:table-cell table:style-name="ce13" office:value-type="string" calcext:value-type="string">
            <text:p><text:a xlink:href="https://maya.tase.co.il/he/funds/mutual-funds/5140272" xlink:type="simple">https://maya.tase.co.il/he/funds/mutual-funds/5140272</text:a></text:p>
          </table:table-cell>
          <table:table-cell table:style-name="ce30" table:content-validation-name="val2" office:value-type="string" calcext:value-type="string">
            <text:p>S&amp;P 500 Market Leaders</text:p>
          </table:table-cell>
          <table:table-cell table:style-name="ce34" table:content-validation-name="val3" table:formula="of:=COM.MICROSOFT.IFS(ISNUMBER(SEARCH(&quot;/etf/&quot;; [.C126])); &quot;קרן סל&quot;; ISNUMBER(SEARCH(&quot;/mutual-funds/&quot;; [.C126])); &quot;קרן&quot;; ISNUMBER(SEARCH(&quot;/market_data/security/&quot;; [.C126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.1792" calcext:value-type="percentage">
            <text:p>17.92%</text:p>
          </table:table-cell>
          <table:table-cell table:style-name="ce38" table:formula="of:=SUM([.F126]-[.N126])" office:value-type="percentage" office:value="-0.0196" calcext:value-type="percentage">
            <text:p>-1.96%</text:p>
          </table:table-cell>
          <table:table-cell table:style-name="ce51" table:formula="of:=SUM([.K126]+[.L126]+[.M126])" office:value-type="percentage" office:value="0.0051" calcext:value-type="percentage">
            <text:p>0.51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/>
          <table:table-cell table:style-name="ce51" office:value-type="percentage" office:value="0.0049" calcext:value-type="percentage">
            <text:p>0.49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126]; [Indices.$A$2:.$A$100]; 0))" office:value-type="percentage" office:value="0.1988" calcext:value-type="percentage">
            <text:p>19.8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1" office:value-type="float" office:value="5140280" calcext:value-type="float">
            <text:p>5140280</text:p>
          </table:table-cell>
          <table:table-cell table:style-name="ce15" office:value-type="string" calcext:value-type="string">
            <text:p><text:a xlink:href="https://maya.tase.co.il/he/funds/mutual-funds/5140280" xlink:type="simple">https://maya.tase.co.il/he/funds/mutual-funds/5140280</text:a></text:p>
          </table:table-cell>
          <table:table-cell table:style-name="ce31" table:content-validation-name="val2" office:value-type="string" calcext:value-type="string">
            <text:p>S&amp;P 500 Market Leaders</text:p>
          </table:table-cell>
          <table:table-cell table:style-name="ce35" table:content-validation-name="val3" table:formula="of:=COM.MICROSOFT.IFS(ISNUMBER(SEARCH(&quot;/etf/&quot;; [.C127])); &quot;קרן סל&quot;; ISNUMBER(SEARCH(&quot;/mutual-funds/&quot;; [.C127])); &quot;קרן&quot;; ISNUMBER(SEARCH(&quot;/market_data/security/&quot;; [.C127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0086" calcext:value-type="percentage">
            <text:p>0.86%</text:p>
          </table:table-cell>
          <table:table-cell table:style-name="ce39" table:formula="of:=SUM([.F127]-[.N127])" office:value-type="percentage" office:value="-0.1902" calcext:value-type="percentage">
            <text:p>-19.02%</text:p>
          </table:table-cell>
          <table:table-cell table:style-name="ce52" table:formula="of:=SUM([.K127]+[.L127]+[.M127])" office:value-type="percentage" office:value="0.0051" calcext:value-type="percentage">
            <text:p>0.51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49" calcext:value-type="percentage">
            <text:p>0.49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127]; [Indices.$A$2:.$A$100]; 0))" office:value-type="percentage" office:value="0.1988" calcext:value-type="percentage">
            <text:p>19.88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1" office:value-type="float" office:value="5140132" calcext:value-type="float">
            <text:p>5140132</text:p>
          </table:table-cell>
          <table:table-cell table:style-name="ce15" office:value-type="string" calcext:value-type="string">
            <text:p><text:a xlink:href="https://maya.tase.co.il/he/funds/mutual-funds/5140132" xlink:type="simple">https://maya.tase.co.il/he/funds/mutual-funds/5140132</text:a></text:p>
          </table:table-cell>
          <table:table-cell table:style-name="ce31" table:content-validation-name="val2" office:value-type="string" calcext:value-type="string">
            <text:p>S&amp;P 500 Momentum</text:p>
          </table:table-cell>
          <table:table-cell table:style-name="ce35" table:content-validation-name="val3" table:formula="of:=COM.MICROSOFT.IFS(ISNUMBER(SEARCH(&quot;/etf/&quot;; [.C128])); &quot;קרן סל&quot;; ISNUMBER(SEARCH(&quot;/mutual-funds/&quot;; [.C128])); &quot;קרן&quot;; ISNUMBER(SEARCH(&quot;/market_data/security/&quot;; [.C128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3399" calcext:value-type="percentage">
            <text:p>33.99%</text:p>
          </table:table-cell>
          <table:table-cell table:style-name="ce39" table:formula="of:=SUM([.F128]-[.N128])" office:value-type="percentage" office:value="-0.093" calcext:value-type="percentage">
            <text:p>-9.30%</text:p>
          </table:table-cell>
          <table:table-cell table:style-name="ce52" table:formula="of:=SUM([.K128]+[.L128]+[.M128])" office:value-type="percentage" office:value="0.00525" calcext:value-type="percentage">
            <text:p>0.525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/>
          <table:table-cell table:style-name="ce52" office:value-type="percentage" office:value="0.005" calcext:value-type="percentage">
            <text:p>0.5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25" calcext:value-type="percentage">
            <text:p>0.025%</text:p>
          </table:table-cell>
          <table:table-cell table:style-name="ce66" table:formula="of:=INDEX([Indices.$B$2:.$B$100]; MATCH([.D128]; [Indices.$A$2:.$A$100]; 0))" office:value-type="percentage" office:value="0.4329" calcext:value-type="percentage">
            <text:p>43.29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1" office:value-type="float" office:value="5139571" calcext:value-type="float">
            <text:p>5139571</text:p>
          </table:table-cell>
          <table:table-cell table:style-name="ce15" office:value-type="string" calcext:value-type="string">
            <text:p><text:a xlink:href="https://maya.tase.co.il/he/funds/mutual-funds/5139571" xlink:type="simple">https://maya.tase.co.il/he/funds/mutual-funds/5139571</text:a></text:p>
          </table:table-cell>
          <table:table-cell table:style-name="ce31" table:content-validation-name="val2" office:value-type="string" calcext:value-type="string">
            <text:p>S&amp;P 500 Momentum</text:p>
          </table:table-cell>
          <table:table-cell table:style-name="ce35" table:content-validation-name="val3" table:formula="of:=COM.MICROSOFT.IFS(ISNUMBER(SEARCH(&quot;/etf/&quot;; [.C129])); &quot;קרן סל&quot;; ISNUMBER(SEARCH(&quot;/mutual-funds/&quot;; [.C129])); &quot;קרן&quot;; ISNUMBER(SEARCH(&quot;/market_data/security/&quot;; [.C129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.1521" calcext:value-type="percentage">
            <text:p>15.21%</text:p>
          </table:table-cell>
          <table:table-cell table:style-name="ce39" table:formula="of:=SUM([.F129]-[.N129])" office:value-type="percentage" office:value="-0.2808" calcext:value-type="percentage">
            <text:p>-28.08%</text:p>
          </table:table-cell>
          <table:table-cell table:style-name="ce52" table:formula="of:=SUM([.K129]+[.L129]+[.M129])" office:value-type="percentage" office:value="0.00525" calcext:value-type="percentage">
            <text:p>0.525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/>
          <table:table-cell table:style-name="ce52" office:value-type="percentage" office:value="0.005" calcext:value-type="percentage">
            <text:p>0.5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25" calcext:value-type="percentage">
            <text:p>0.025%</text:p>
          </table:table-cell>
          <table:table-cell table:style-name="ce66" table:formula="of:=INDEX([Indices.$B$2:.$B$100]; MATCH([.D129]; [Indices.$A$2:.$A$100]; 0))" office:value-type="percentage" office:value="0.4329" calcext:value-type="percentage">
            <text:p>43.29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1" office:value-type="float" office:value="5141684" calcext:value-type="float">
            <text:p>5141684</text:p>
          </table:table-cell>
          <table:table-cell table:style-name="ce15" office:value-type="string" calcext:value-type="string">
            <text:p><text:a xlink:href="https://maya.tase.co.il/he/funds/mutual-funds/5141684" xlink:type="simple">https://maya.tase.co.il/he/funds/mutual-funds/5141684</text:a></text:p>
          </table:table-cell>
          <table:table-cell table:style-name="ce31" table:content-validation-name="val2" office:value-type="string" calcext:value-type="string">
            <text:p>S&amp;P 500 Momentum</text:p>
          </table:table-cell>
          <table:table-cell table:style-name="ce35" table:content-validation-name="val3" table:formula="of:=COM.MICROSOFT.IFS(ISNUMBER(SEARCH(&quot;/etf/&quot;; [.C130])); &quot;קרן סל&quot;; ISNUMBER(SEARCH(&quot;/mutual-funds/&quot;; [.C130])); &quot;קרן&quot;; ISNUMBER(SEARCH(&quot;/market_data/security/&quot;; [.C130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table:formula="of:=SUM([.F130]-[.N130])" office:value-type="percentage" office:value="-0.4329" calcext:value-type="percentage">
            <text:p>-43.29%</text:p>
          </table:table-cell>
          <table:table-cell table:style-name="ce52" table:formula="of:=SUM([.K130]+[.L130]+[.M130])" office:value-type="percentage" office:value="0.0027" calcext:value-type="percentage">
            <text:p>0.27%</text:p>
          </table:table-cell>
          <table:table-cell table:style-name="ce56" table:content-validation-name="val4" office:value-type="string" calcext:value-type="string">
            <text:p>4A</text:p>
          </table:table-cell>
          <table:table-cell table:style-name="ce62" office:value-type="string" calcext:value-type="string">
            <text:p>אין נתון לשנה</text:p>
          </table:table-cell>
          <table:table-cell table:style-name="ce52" office:value-type="percentage" office:value="0.0025" calcext:value-type="percentage">
            <text:p>0.25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2" calcext:value-type="percentage">
            <text:p>0.02%</text:p>
          </table:table-cell>
          <table:table-cell table:style-name="ce66" table:formula="of:=INDEX([Indices.$B$2:.$B$100]; MATCH([.D130]; [Indices.$A$2:.$A$100]; 0))" office:value-type="percentage" office:value="0.4329" calcext:value-type="percentage">
            <text:p>43.29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41676" calcext:value-type="float">
            <text:p>5141676</text:p>
          </table:table-cell>
          <table:table-cell table:style-name="ce13" office:value-type="string" calcext:value-type="string">
            <text:p><text:a xlink:href="https://maya.tase.co.il/he/funds/mutual-funds/5141676" xlink:type="simple">https://maya.tase.co.il/he/funds/mutual-funds/5141676</text:a></text:p>
          </table:table-cell>
          <table:table-cell table:style-name="ce30" table:content-validation-name="val2" office:value-type="string" calcext:value-type="string">
            <text:p>S&amp;P 500 Momentum</text:p>
          </table:table-cell>
          <table:table-cell table:style-name="ce34" table:content-validation-name="val3" table:formula="of:=COM.MICROSOFT.IFS(ISNUMBER(SEARCH(&quot;/etf/&quot;; [.C131])); &quot;קרן סל&quot;; ISNUMBER(SEARCH(&quot;/mutual-funds/&quot;; [.C131])); &quot;קרן&quot;; ISNUMBER(SEARCH(&quot;/market_data/security/&quot;; [.C131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8" table:formula="of:=SUM([.F131]-[.N131])" office:value-type="percentage" office:value="-0.4329" calcext:value-type="percentage">
            <text:p>-43.29%</text:p>
          </table:table-cell>
          <table:table-cell table:style-name="ce51" table:formula="of:=SUM([.K131]+[.L131]+[.M131])" office:value-type="percentage" office:value="0.0027" calcext:value-type="percentage">
            <text:p>0.27%</text:p>
          </table:table-cell>
          <table:table-cell table:style-name="ce55" table:content-validation-name="val4" office:value-type="string" calcext:value-type="string">
            <text:p>4D + דולר</text:p>
          </table:table-cell>
          <table:table-cell table:style-name="ce61" office:value-type="string" calcext:value-type="string">
            <text:p>אין נתון לשנה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65" table:formula="of:=INDEX([Indices.$B$2:.$B$100]; MATCH([.D131]; [Indices.$A$2:.$A$100]; 0))" office:value-type="percentage" office:value="0.4329" calcext:value-type="percentage">
            <text:p>43.29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1" office:value-type="float" office:value="5140850" calcext:value-type="float">
            <text:p>5140850</text:p>
          </table:table-cell>
          <table:table-cell table:style-name="ce15" office:value-type="string" calcext:value-type="string">
            <text:p><text:a xlink:href="https://maya.tase.co.il/he/funds/mutual-funds/5140850" xlink:type="simple">https://maya.tase.co.il/he/funds/mutual-funds/5140850</text:a></text:p>
          </table:table-cell>
          <table:table-cell table:style-name="ce31" table:content-validation-name="val2" office:value-type="string" calcext:value-type="string">
            <text:p>S&amp;P 500 Momentum</text:p>
          </table:table-cell>
          <table:table-cell table:style-name="ce35" table:content-validation-name="val3" table:formula="of:=COM.MICROSOFT.IFS(ISNUMBER(SEARCH(&quot;/etf/&quot;; [.C132])); &quot;קרן סל&quot;; ISNUMBER(SEARCH(&quot;/mutual-funds/&quot;; [.C132])); &quot;קרן&quot;; ISNUMBER(SEARCH(&quot;/market_data/security/&quot;; [.C132])); &quot;קרן חוץ&quot;; 1; &quot;&quot;)" office:value-type="string" office:string-value="קרן" calcext:value-type="string">
            <text:p>קרן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table:formula="of:=SUM([.F132]-[.N132])" office:value-type="percentage" office:value="-0.4329" calcext:value-type="percentage">
            <text:p>-43.29%</text:p>
          </table:table-cell>
          <table:table-cell table:style-name="ce52" table:formula="of:=SUM([.K132]+[.L132]+[.M132])" office:value-type="percentage" office:value="0.00275" calcext:value-type="percentage">
            <text:p>0.275%</text:p>
          </table:table-cell>
          <table:table-cell table:style-name="ce56" table:content-validation-name="val4" office:value-type="string" calcext:value-type="string">
            <text:p>4D + דולר</text:p>
          </table:table-cell>
          <table:table-cell table:style-name="ce62" office:value-type="string" calcext:value-type="string">
            <text:p>אין נתון לשנה</text:p>
          </table:table-cell>
          <table:table-cell table:style-name="ce52" office:value-type="percentage" office:value="0.0025" calcext:value-type="percentage">
            <text:p>0.25%</text:p>
          </table:table-cell>
          <table:table-cell table:style-name="ce52" office:value-type="percentage" office:value="0" calcext:value-type="percentage">
            <text:p>0%</text:p>
          </table:table-cell>
          <table:table-cell table:style-name="ce52" office:value-type="percentage" office:value="0.00025" calcext:value-type="percentage">
            <text:p>0.025%</text:p>
          </table:table-cell>
          <table:table-cell table:style-name="ce66" table:formula="of:=INDEX([Indices.$B$2:.$B$100]; MATCH([.D132]; [Indices.$A$2:.$A$100]; 0))" office:value-type="percentage" office:value="0.4329" calcext:value-type="percentage">
            <text:p>43.29%</text:p>
          </table:table-cell>
          <table:table-cell/>
        </table:table-row>
        <table:table-row table:style-name="ro2">
          <table:table-cell table:style-name="ce5" office:value-type="date" office:date-value="2026-06-13" calcext:value-type="date">
            <text:p>13/06/26</text:p>
          </table:table-cell>
          <table:table-cell table:style-name="ce10" office:value-type="float" office:value="5141114" calcext:value-type="float">
            <text:p>5141114</text:p>
          </table:table-cell>
          <table:table-cell table:style-name="ce13" office:value-type="string" calcext:value-type="string">
            <text:p><text:a xlink:href="https://maya.tase.co.il/he/funds/mutual-funds/5141114" xlink:type="simple">https://maya.tase.co.il/he/funds/mutual-funds/5141114</text:a></text:p>
          </table:table-cell>
          <table:table-cell table:style-name="ce30" table:content-validation-name="val2" office:value-type="string" calcext:value-type="string">
            <text:p>S&amp;P 500 Momentum</text:p>
          </table:table-cell>
          <table:table-cell table:style-name="ce34" table:content-validation-name="val3" table:formula="of:=COM.MICROSOFT.IFS(ISNUMBER(SEARCH(&quot;/etf/&quot;; [.C133])); &quot;קרן סל&quot;; ISNUMBER(SEARCH(&quot;/mutual-funds/&quot;; [.C133])); &quot;קרן&quot;; ISNUMBER(SEARCH(&quot;/market_data/security/&quot;; [.C133])); &quot;קרן חוץ&quot;; 1; &quot;&quot;)" office:value-type="string" office:string-value="קרן" calcext:value-type="string">
            <text:p>קרן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8" table:formula="of:=SUM([.F133]-[.N133])" office:value-type="percentage" office:value="-0.4329" calcext:value-type="percentage">
            <text:p>-43.29%</text:p>
          </table:table-cell>
          <table:table-cell table:style-name="ce51" table:formula="of:=SUM([.K133]+[.L133]+[.M133])" office:value-type="percentage" office:value="0.00275" calcext:value-type="percentage">
            <text:p>0.275%</text:p>
          </table:table-cell>
          <table:table-cell table:style-name="ce55" table:content-validation-name="val4" office:value-type="string" calcext:value-type="string">
            <text:p>4A</text:p>
          </table:table-cell>
          <table:table-cell table:style-name="ce61" office:value-type="string" calcext:value-type="string">
            <text:p>אין נתון לשנה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51" office:value-type="percentage" office:value="0" calcext:value-type="percentage">
            <text:p>0%</text:p>
          </table:table-cell>
          <table:table-cell table:style-name="ce51" office:value-type="percentage" office:value="0.00025" calcext:value-type="percentage">
            <text:p>0.025%</text:p>
          </table:table-cell>
          <table:table-cell table:style-name="ce65" table:formula="of:=INDEX([Indices.$B$2:.$B$100]; MATCH([.D133]; [Indices.$A$2:.$A$100]; 0))" office:value-type="percentage" office:value="0.4329" calcext:value-type="percentage">
            <text:p>43.29%</text:p>
          </table:table-cell>
          <table:table-cell/>
        </table:table-row>
        <table:table-row table:style-name="ro1" table:number-rows-repeated="1048442">
          <table:table-cell table:number-columns-repeated="3"/>
          <table:table-cell table:content-validation-name="val1"/>
          <table:table-cell table:content-validation-name="val3"/>
          <table:table-cell table:number-columns-repeated="3"/>
          <table:table-cell table:content-validation-name="val4"/>
          <table:table-cell table:number-columns-repeated="6"/>
        </table:table-row>
        <table:table-row table:style-name="ro1">
          <table:table-cell table:number-columns-repeated="3"/>
          <table:table-cell table:content-validation-name="val1"/>
          <table:table-cell table:content-validation-name="val3"/>
          <table:table-cell table:number-columns-repeated="3"/>
          <table:table-cell table:content-validation-name="val4"/>
          <table:table-cell table:number-columns-repeated="6"/>
        </table:table-row>
        <calcext:conditional-formats>
          <calcext:conditional-format calcext:target-range-address="Funds.C1:Funds.C1048576 Funds.B1:Funds.B1">
            <calcext:condition calcext:apply-style-name="Note" calcext:value="duplicate" calcext:base-cell-address="Funds.B1"/>
          </calcext:conditional-format>
        </calcext:conditional-formats>
      </table:table>
      <table:table table:name="Indices" table:style-name="ta1">
        <table:table-column table:style-name="co16" table:default-cell-style-name="ce43"/>
        <table:table-column table:style-name="co17" table:default-cell-style-name="ce44"/>
        <table:table-column table:style-name="co18" table:default-cell-style-name="ce46"/>
        <table:table-column table:style-name="co19" table:default-cell-style-name="ce46"/>
        <table:table-column table:style-name="co20" table:default-cell-style-name="ce48"/>
        <table:table-row table:style-name="ro1">
          <table:table-cell table:style-name="Heading_20_1" office:value-type="string" calcext:value-type="string">
            <text:p>מדד</text:p>
          </table:table-cell>
          <table:table-cell table:style-name="Heading_20_1" office:value-type="string" calcext:value-type="string">
            <text:p>תשואה שנתית נטו</text:p>
          </table:table-cell>
          <table:table-cell table:style-name="Heading_20_1" office:value-type="string" calcext:value-type="string">
            <text:p>קישור למדד</text:p>
          </table:table-cell>
          <table:table-cell table:style-name="Heading_20_1" office:value-type="string" calcext:value-type="string">
            <text:p>קישור למדידת תשואה שנתית</text:p>
          </table:table-cell>
          <table:table-cell table:style-name="Heading_20_1" office:value-type="string" calcext:value-type="string">
            <text:p>תאריך מדידת תשואה</text:p>
          </table:table-cell>
        </table:table-row>
        <table:table-row table:style-name="ro1">
          <table:table-cell table:style-name="ce41" office:value-type="string" calcext:value-type="string">
            <text:p>ת"א 125</text:p>
          </table:table-cell>
          <table:table-cell office:value-type="percentage" office:value="0.5863" calcext:value-type="percentage">
            <text:p>58.63%</text:p>
          </table:table-cell>
          <table:table-cell office:value-type="string" calcext:value-type="string">
            <text:p><text:a xlink:href="https://market.tase.co.il/he/market_data/index/137/major_data" xlink:type="simple">https://market.tase.co.il/he/market_data/index/137/major_data</text:a></text:p>
          </table:table-cell>
          <table:table-cell office:value-type="string" calcext:value-type="string">
            <text:p><text:a xlink:href="https://www.investing.com/indices/ta100" xlink:type="simple">https://www.investing.com/indices/ta100</text:a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table:style-name="ce41" office:value-type="string" calcext:value-type="string">
            <text:p>FTSE ALL WORLD</text:p>
          </table:table-cell>
          <table:table-cell table:style-name="ce45" office:value-type="percentage" office:value="0.2574" calcext:value-type="percentage">
            <text:p>25.74%</text:p>
          </table:table-cell>
          <table:table-cell table:style-name="ce47" office:value-type="string" calcext:value-type="string">
            <text:p><text:a xlink:href="https://www.lseg.com/en/ftse-russell/indices/ftseall-world" xlink:type="simple">https://www.lseg.com/en/ftse-russell/indices/ftseall-world</text:a></text:p>
          </table:table-cell>
          <table:table-cell table:style-name="ce47" office:value-type="string" calcext:value-type="string">
            <text:p><text:a xlink:href="https://www.lseg.com/en/ftse-russell/indices/ftseall-world#index-performance" xlink:type="simple">https://www.lseg.com/en/ftse-russell/indices/ftseall-world#index-performance</text:a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table:style-name="ce42" office:value-type="string" calcext:value-type="string">
            <text:p>MSCI AC WORLD INDEX – NTR</text:p>
          </table:table-cell>
          <table:table-cell office:value-type="percentage" office:value="0.2528" calcext:value-type="percentage">
            <text:p>25.28%</text:p>
          </table:table-cell>
          <table:table-cell office:value-type="string" calcext:value-type="string">
            <text:p><text:span text:style-name="T1"><text:a xlink:href="https://www.msci.com/indexes/index/892400" xlink:type="simple">https://www.msci.com/indexes/index/892400</text:a></text:span></text:p>
          </table:table-cell>
          <table:table-cell office:value-type="string" calcext:value-type="string">
            <text:p><text:span text:style-name="T1"><text:a xlink:href="https://www.msci.com/indexes/index/892400" xlink:type="simple">https://www.msci.com/indexes/index/892400</text:a></text:span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table:style-name="ce42" office:value-type="string" calcext:value-type="string">
            <text:p>MSCI INDIA - NTR</text:p>
          </table:table-cell>
          <table:table-cell office:value-type="percentage" office:value="-0.1263" calcext:value-type="percentage">
            <text:p>-12.63%</text:p>
          </table:table-cell>
          <table:table-cell office:value-type="string" calcext:value-type="string">
            <text:p><text:a xlink:href="https://www.msci.com/indexes/index/935600" xlink:type="simple">https://www.msci.com/indexes/index/935600</text:a></text:p>
          </table:table-cell>
          <table:table-cell office:value-type="string" calcext:value-type="string">
            <text:p><text:a xlink:href="https://www.msci.com/indexes/index/935600" xlink:type="simple">https://www.msci.com/indexes/index/935600</text:a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table:style-name="ce42" office:value-type="string" calcext:value-type="string">
            <text:p>MSCI WORLD INDEX – NTR</text:p>
          </table:table-cell>
          <table:table-cell office:value-type="percentage" office:value="0.2291" calcext:value-type="percentage">
            <text:p>22.91%</text:p>
          </table:table-cell>
          <table:table-cell office:value-type="string" calcext:value-type="string">
            <text:p><text:span text:style-name="T1"><text:a xlink:href="https://www.msci.com/indexes/index/990100" xlink:type="simple">https://www.msci.com/indexes/index/990100</text:a></text:span></text:p>
          </table:table-cell>
          <table:table-cell office:value-type="string" calcext:value-type="string">
            <text:p><text:span text:style-name="T1"><text:a xlink:href="https://www.msci.com/indexes/index/990100" xlink:type="simple">https://www.msci.com/indexes/index/990100</text:a></text:span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office:value-type="string" calcext:value-type="string">
            <text:p>NASDAQ 100 – NTR</text:p>
          </table:table-cell>
          <table:table-cell office:value-type="percentage" office:value="0.3764" calcext:value-type="percentage">
            <text:p>37.64%</text:p>
          </table:table-cell>
          <table:table-cell office:value-type="string" calcext:value-type="string">
            <text:p><text:a xlink:href="https://www.nasdaq.com/market-activity/index/ndx" xlink:type="simple">https://www.nasdaq.com/market-activity/index/ndx</text:a></text:p>
          </table:table-cell>
          <table:table-cell office:value-type="string" calcext:value-type="string">
            <text:p><text:a xlink:href="https://www.investing.com/indices/nasdaq-100-notional-net-tr" xlink:type="simple">https://www.investing.com/indices/nasdaq-100-notional-net-tr</text:a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office:value-type="string" calcext:value-type="string">
            <text:p>NIKKEI 225 – NTR</text:p>
          </table:table-cell>
          <table:table-cell office:value-type="percentage" office:value="0.754" calcext:value-type="percentage">
            <text:p>75.40%</text:p>
          </table:table-cell>
          <table:table-cell office:value-type="string" calcext:value-type="string">
            <text:p><text:a xlink:href="https://indexes.nikkei.co.jp/en/nkave" xlink:type="simple">https://indexes.nikkei.co.jp/en/nkave</text:a></text:p>
          </table:table-cell>
          <table:table-cell office:value-type="string" calcext:value-type="string">
            <text:p><text:a xlink:href="https://www.investing.com/indices/nikkei-225-net-total-return" xlink:type="simple">https://www.investing.com/indices/nikkei-225-net-total-return</text:a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office:value-type="string" calcext:value-type="string">
            <text:p>S&amp;P 500 – NTR</text:p>
          </table:table-cell>
          <table:table-cell office:value-type="percentage" office:value="0.2398" calcext:value-type="percentage">
            <text:p>23.98%</text:p>
          </table:table-cell>
          <table:table-cell office:value-type="string" calcext:value-type="string">
            <text:p><text:a xlink:href="https://www.spglobal.com/spdji/en/indices/equity/sp-500/" xlink:type="simple">https://www.spglobal.com/spdji/en/indices/equity/sp-500/</text:a></text:p>
          </table:table-cell>
          <table:table-cell office:value-type="string" calcext:value-type="string">
            <text:p><text:a xlink:href="https://www.spglobal.com/spdji/en/indices/equity/sp-500/?currency=USD&amp;returntype=N-#overview" xlink:type="simple">https://www.spglobal.com/spdji/en/indices/equity/sp-500/?currency=USD&amp;returntype=N-#overview</text:a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office:value-type="string" calcext:value-type="string">
            <text:p>S&amp;P 500 Growth</text:p>
          </table:table-cell>
          <table:table-cell office:value-type="percentage" office:value="0.2798" calcext:value-type="percentage">
            <text:p>27.98%</text:p>
          </table:table-cell>
          <table:table-cell office:value-type="string" calcext:value-type="string">
            <text:p><text:a xlink:href="https://www.spglobal.com/spdji/en/indices/equity/sp-500-growth" xlink:type="simple">https://www.spglobal.com/spdji/en/indices/equity/sp-500-growth</text:a></text:p>
          </table:table-cell>
          <table:table-cell office:value-type="string" calcext:value-type="string">
            <text:p><text:a xlink:href="https://www.spglobal.com/spdji/en/indices/equity/sp-500-growth/?currency=USD&amp;returntype=N-#overview" xlink:type="simple">https://www.spglobal.com/spdji/en/indices/equity/sp-500-growth/?currency=USD&amp;returntype=N-#overview</text:a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office:value-type="string" calcext:value-type="string">
            <text:p>S&amp;P 500 Market Leaders</text:p>
          </table:table-cell>
          <table:table-cell office:value-type="percentage" office:value="0.1988" calcext:value-type="percentage">
            <text:p>19.88%</text:p>
          </table:table-cell>
          <table:table-cell office:value-type="string" calcext:value-type="string">
            <text:p><text:a xlink:href="https://www.spglobal.com/spdji/en/indices/dividends-factors/sp-500-market-leaders-index" xlink:type="simple">https://www.spglobal.com/spdji/en/indices/dividends-factors/sp-500-market-leaders-index</text:a></text:p>
          </table:table-cell>
          <table:table-cell office:value-type="string" calcext:value-type="string">
            <text:p><text:a xlink:href="https://www.spglobal.com/spdji/en/indices/dividends-factors/sp-500-market-leaders-index/?currency=USD&amp;returntype=N-#overview" xlink:type="simple">https://www.spglobal.com/spdji/en/indices/dividends-factors/sp-500-market-leaders-index/?currency=USD&amp;returntype=N-#overview</text:a></text:p>
          </table:table-cell>
          <table:table-cell office:value-type="date" office:date-value="2026-06-13" calcext:value-type="date">
            <text:p>13/06/26</text:p>
          </table:table-cell>
        </table:table-row>
        <table:table-row table:style-name="ro1">
          <table:table-cell office:value-type="string" calcext:value-type="string">
            <text:p>S&amp;P 500 Momentum</text:p>
          </table:table-cell>
          <table:table-cell office:value-type="percentage" office:value="0.4329" calcext:value-type="percentage">
            <text:p>43.29%</text:p>
          </table:table-cell>
          <table:table-cell office:value-type="string" calcext:value-type="string">
            <text:p><text:a xlink:href="https://www.spglobal.com/spdji/en/indices/dividends-factors/sp-500-momentum-index/" xlink:type="simple">https://www.spglobal.com/spdji/en/indices/dividends-factors/sp-500-momentum-index/</text:a></text:p>
          </table:table-cell>
          <table:table-cell office:value-type="string" calcext:value-type="string">
            <text:p><text:a xlink:href="https://www.spglobal.com/spdji/en/indices/dividends-factors/sp-500-momentum-index/?currency=USD&amp;returntype=N-#overview" xlink:type="simple">https://www.spglobal.com/spdji/en/indices/dividends-factors/sp-500-momentum-index/?currency=USD&amp;returntype=N-#overview</text:a></text:p>
          </table:table-cell>
          <table:table-cell office:value-type="date" office:date-value="2026-06-13" calcext:value-type="date">
            <text:p>13/06/26</text:p>
          </table:table-cell>
        </table:table-row>
      </table:table>
      <table:named-expressions/>
      <table:database-ranges>
        <table:database-range table:name="__Anonymous_Sheet_DB__0" table:target-range-address="Funds.A1:Funds.M133" table:display-filter-buttons="true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Indices.A1:Indices.E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imbus Sans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Heebo" style:font-family-generic-asian="system" style:font-pitch-asian="variable" style:font-size-asian="12pt" style:language-asian="zh" style:country-asian="CN" style:font-family-complex="'Liberation Serif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percentage-style style:name="N123">
      <number:number number:decimal-places="4" number:min-decimal-places="4" number:min-integer-digits="1"/>
      <number:text>%</number:text>
    </number:percentage-style>
    <number:percentage-style style:name="N124">
      <number:number number:decimal-places="3" number:min-decimal-places="3" number:min-integer-digits="1"/>
      <number:text>%</number:text>
    </number:percentage-style>
    <number:number-style style:name="N125">
      <number:number number:decimal-places="1" number:min-decimal-places="1" number:min-integer-digits="1"/>
    </number:number-style>
    <number:percentage-style style:name="N126P0" style:volatile="true">
      <number:number number:decimal-places="4" number:min-decimal-places="4" number:min-integer-digits="1"/>
      <number:text>%</number:text>
    </number:percentage-style>
    <number:percentage-style style:name="N126">
      <style:text-properties fo:color="#ff0000"/>
      <number:text>-</number:text>
      <number:number number:decimal-places="4" number:min-decimal-places="4" number:min-integer-digits="1"/>
      <number:text>%</number:text>
      <style:map style:condition="value()&gt;=0" style:apply-style-name="N126P0"/>
    </number:percentage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percentage-style style:name="N128">
      <number:number number:decimal-places="4" number:min-decimal-places="0" number:decimal-replacement="" number:min-integer-digits="1"/>
      <number:text>%</number:text>
    </number:percentage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355e00" style:text-align-source="fix" style:repeat-content="false" fo:border="0.06pt solid #0080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5c8526" fo:border="0.06pt solid #004a4a"/>
      <style:text-properties fo:color="#ffffff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3"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ffff66" fo:font-weight="normal"/>
    </style:style>
    <style:style style:name="Card" style:family="table-cell" style:parent-style-name="Default">
      <style:table-cell-properties fo:background-color="#94bd5e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8000" fo:border-right="none" fo:border-top="0.06pt solid #008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8000"/>
    </style:style>
    <style:style style:name="Card_20_TR" style:display-name="Card TR" style:family="table-cell" style:parent-style-name="Card">
      <style:table-cell-properties fo:border-bottom="none" fo:border-left="none" fo:border-right="0.06pt solid #008000" fo:border-top="0.06pt solid #008000"/>
    </style:style>
    <style:style style:name="Card_20_L" style:display-name="Card L" style:family="table-cell" style:parent-style-name="Card">
      <style:table-cell-properties fo:border-bottom="none" fo:border-left="0.06pt solid #008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8000" fo:border-top="none"/>
    </style:style>
    <style:style style:name="Card_20_B" style:display-name="Card B" style:family="table-cell" style:parent-style-name="Card">
      <style:table-cell-properties fo:border-bottom="0.06pt solid #008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8000" fo:border-left="0.06pt solid #008000" fo:border-right="none" fo:border-top="none"/>
    </style:style>
    <style:style style:name="Card_20_BR" style:display-name="Card BR" style:family="table-cell" style:parent-style-name="Card">
      <style:table-cell-properties fo:border-bottom="0.06pt solid #008000" fo:border-left="none" fo:border-right="0.06pt solid #008000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6-14">00/00/0000</text:date></text:span><text:span text:style-name="MT1">, </text:span><text:span text:style-name="MT1"><text:time style:data-style-name="N2" text:time-value="23:55:52.19165770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07:38:45.136008404</meta:creation-date>
    <dc:date>2026-06-14T23:56:45.164043941</dc:date>
    <meta:editing-duration>P2DT3H15M37S</meta:editing-duration>
    <meta:editing-cycles>677</meta:editing-cycles>
    <meta:generator>LibreOffice/25.8.6.2$Linux_X86_64 LibreOffice_project/580$Build-2</meta:generator>
    <meta:print-date>2026-06-14T23:56:24.357677565</meta:print-date>
    <meta:printed-by>PDF files</meta:printed-by>
    <meta:document-statistic meta:table-count="2" meta:cell-count="1810" meta:object-count="0"/>
  </office:meta>
</office:document-meta>
</file>